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F14FCC3D055622C0.png" manifest:media-type="image/png"/>
  <manifest:file-entry manifest:full-path="Pictures/100002010000058E00000664C1559BD371BC19A0.png" manifest:media-type="image/png"/>
  <manifest:file-entry manifest:full-path="Pictures/1000020100000258000002588DEC3A807A82A2ED.png" manifest:media-type="image/png"/>
  <manifest:file-entry manifest:full-path="Pictures/100002010000078000000438C4A1CF5D42B33C14.png" manifest:media-type="image/png"/>
  <manifest:file-entry manifest:full-path="Pictures/10000000000000E6000000DBA2FA6FDB945CE5C5.png" manifest:media-type="image/png"/>
  <manifest:file-entry manifest:full-path="Pictures/1000020100000800000007F1F4ED2107A96DD24F.png" manifest:media-type="image/png"/>
  <manifest:file-entry manifest:full-path="Pictures/100002010000078000000438F65FBB7085B19647.png" manifest:media-type="image/png"/>
  <manifest:file-entry manifest:full-path="Pictures/1000020100000780000004380007A137417BB6AD.png" manifest:media-type="image/png"/>
  <manifest:file-entry manifest:full-path="Pictures/100002010000078000000438FB9888FCEB2E67B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exend" svg:font-family="Lexen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image-name="msFillBitmap_20_25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image-name="msFillBitmap_20_26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image-name="msFillBitmap_20_27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image-name="msFillBitmap_20_28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bitmap" draw:fill-image-name="msFillBitmap_20_29" style:repeat="stretch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bitmap" draw:fill-image-name="msFillBitmap_20_30" style:repeat="stretch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bitmap" draw:fill-image-name="msFillBitmap_20_31" style:repeat="stretch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bitmap" draw:fill-image-name="msFillBitmap_20_32" style:repeat="stretch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bitmap" draw:fill-image-name="msFillBitmap_20_33" style:repeat="stretch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bitmap" draw:fill-image-name="msFillBitmap_20_34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04cm" fo:padding-bottom="0.204cm" fo:padding-left="0.204cm" fo:padding-right="0.20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1.846cm, 0cm, 1.599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solid" draw:fill-color="#ffffff" draw:opacity="24%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>
      <style:graphic-properties draw:stroke="none" svg:stroke-width="0cm" draw:fill="solid" draw:fill-color="#ffffff" draw:opacity="24%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solid" draw:fill-color="#ffffff" draw:opacity="24%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811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5" style:family="paragraph">
      <style:paragraph-properties fo:margin-left="2.54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exend" fo:font-size="42.7999992370606pt" fo:letter-spacing="normal" fo:font-style="normal" style:text-underline-style="none" fo:font-weight="bold" style:font-name-asian="Lexend" style:font-size-asian="42.7999992370606pt" style:font-style-asian="normal" style:font-weight-asian="bold" style:font-name-complex="Lexend" style:font-size-complex="42.799999237060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exend" fo:font-size="12.1000003814697pt" fo:letter-spacing="normal" fo:font-style="normal" style:text-underline-style="none" fo:font-weight="normal" style:font-name-asian="Lexend" style:font-size-asian="12.1000003814697pt" style:font-style-asian="normal" style:font-weight-asian="normal" style:font-name-complex="Lexend" style:font-size-complex="12.100000381469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56pt" fo:letter-spacing="normal" fo:font-style="normal" style:text-underline-style="none" fo:font-weight="bold" style:font-name-asian="Arial" style:font-size-asian="56pt" style:font-style-asian="normal" style:font-weight-asian="bold" style:font-name-complex="Arial" style:font-size-complex="5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e60013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e60013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2" style:family="text">
      <style:text-properties fo:font-variant="normal" fo:text-transform="none" fo:color="#e60013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3" style:family="text">
      <style:text-properties fo:font-variant="normal" fo:text-transform="none" fo:color="#333333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4" style:family="text">
      <style:text-properties fo:font-variant="normal" fo:text-transform="none" fo:color="#7f6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7f6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53pt" fo:letter-spacing="normal" fo:font-style="normal" style:text-underline-style="none" fo:font-weight="bold" style:font-name-asian="Arial" style:font-size-asian="53pt" style:font-style-asian="normal" style:font-weight-asian="bold" style:font-name-complex="Arial" style:font-size-complex="53pt" style:font-style-complex="normal" style:font-weight-complex="bold"/>
    </style:style>
    <style:style style:name="T29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exend" fo:font-size="56pt" fo:letter-spacing="normal" fo:font-style="normal" style:text-underline-style="none" fo:font-weight="bold" style:font-name-asian="Lexend" style:font-size-asian="56pt" style:font-style-asian="normal" style:font-weight-asian="bold" style:font-name-complex="Lexend" style:font-size-complex="5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exend" fo:font-size="15pt" fo:letter-spacing="normal" fo:font-style="normal" style:text-underline-style="none" fo:font-weight="normal" style:font-name-asian="Lexend" style:font-size-asian="15pt" style:font-style-asian="normal" style:font-weight-asian="normal" style:font-name-complex="Lexend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42cm" text:min-label-width="0.9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42cm" text:min-label-width="0.928cm"/>
        <style:text-properties style:font-name="Arial" fo:color="#000000" fo:font-size="100%"/>
      </text:list-level-style-bullet>
      <text:list-level-style-bullet text:level="2" text:bullet-char="○">
        <style:list-level-properties text:space-before="1.678cm" text:min-label-width="0.86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4cm" text:min-label-width="0.916cm"/>
        <style:text-properties style:font-name="Arial" fo:color="#33333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54cm" text:min-label-width="0.916cm"/>
        <style:text-properties style:font-name="Arial" fo:color="#33333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33333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Arial" fo:color="#33333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33333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Arial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style:font-name="Arial" fo:color="#333333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8cm" text:min-label-width="0.952cm"/>
        <style:text-properties style:font-name="Arial" fo:color="#333333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000000" fo:font-size="100%"/>
      </text:list-level-style-bullet>
      <text:list-level-style-bullet text:level="3" text:bullet-char="■">
        <style:list-level-properties text:space-before="2.947cm" text:min-label-width="0.863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18cm" text:min-label-width="0.952cm"/>
        <style:text-properties style:font-name="Arial" fo:color="#333333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333333" fo:font-size="100%"/>
      </text:list-level-style-bullet>
      <text:list-level-style-bullet text:level="3" text:bullet-char="■">
        <style:list-level-properties text:space-before="2.947cm" text:min-label-width="0.863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42cm" text:min-label-width="0.928cm"/>
        <style:text-properties fo:color="#595959" fo:font-size="100%"/>
      </text:list-level-style-number>
      <text:list-level-style-bullet text:level="2" text:bullet-char="○">
        <style:list-level-properties text:space-before="1.678cm" text:min-label-width="0.86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8.907cm" svg:height="2.48cm" svg:x="1.587cm" svg:y="4.663cm" presentation:class="title" presentation:user-transformed="true">
          <draw:text-box>
            <text:p text:style-name="P1"><text:span text:style-name="T1">LoongArch Biweekly</text:span></text:p>
          </draw:text-box>
        </draw:frame>
        <draw:frame draw:name="Google Shape;55;p13" presentation:style-name="pr2" draw:text-style-name="P3" draw:layer="layout" svg:width="15.706cm" svg:height="1.765cm" svg:x="1.677cm" svg:y="7.399cm" presentation:class="subtitle" presentation:user-transformed="true">
          <draw:text-box>
            <text:p text:style-name="P1"><text:span text:style-name="T2">Сессия #2 (Май 13, 2026)</text:span></text:p>
          </draw:text-box>
        </draw:frame>
        <draw:g draw:name="Google Shape;56;p13">
          <draw:frame draw:name="Google Shape;57;p13" draw:style-name="gr1" draw:text-style-name="P4" draw:layer="layout" svg:width="4.888cm" svg:height="4.888cm" svg:x="19.305cm" svg:y="2.607cm">
            <draw:image xlink:href="Pictures/1000020100000258000002588DEC3A807A82A2ED.png" xlink:type="simple" xlink:show="embed" xlink:actuate="onLoad">
              <text:p/>
            </draw:image>
          </draw:frame>
          <draw:frame draw:name="Google Shape;58;p13" draw:style-name="gr1" draw:text-style-name="P4" draw:layer="layout" svg:width="4.888cm" svg:height="4.852cm" svg:x="19.305cm" svg:y="7.496cm">
            <draw:image xlink:href="Pictures/1000020100000800000007F1F4ED2107A96DD24F.png" xlink:type="simple" xlink:show="embed" xlink:actuate="onLoad">
              <text:p/>
            </draw:image>
          </draw:frame>
          <draw:custom-shape draw:name="Google Shape;59;p13" draw:style-name="gr2" draw:text-style-name="P6" draw:layer="layout" svg:width="3.845cm" svg:height="0.919cm" svg:x="19.826cm" svg:y="6.926cm">
            <text:p text:style-name="P5"><text:span text:style-name="T3">Discord 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еред тем, как мы начнем" draw:style-name="dp3" draw:master-page-name="TITLE_5f_AND_5f_BODY" presentation:presentation-page-layout-name="AL2T1">
        <draw:frame draw:name="Google Shape;64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Перед тем, как мы начнем</text:span></text:p>
          </draw:text-box>
        </draw:frame>
        <draw:frame draw:name="Google Shape;65;p14" presentation:style-name="pr5" draw:text-style-name="P10" draw:layer="layout" svg:width="23.667cm" svg:height="10.29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Эта встреча организована сообществом энтузиастов Loongson — сторонней организацией, не связанной с компанией Loongson Technology, а также с другими компаниями, организациями и учреждениями, упомянутыми в данной презентации. </text:span></text:p>
              </text:list-item>
              <text:list-item>
                <text:p text:style-name="P9"><text:span text:style-name="T5">Пожалуйста, ограничьтесь обсуждением только общедоступной информации — мы не будем отвечать на вопросы о продуктах и разработках, находящихся на стадии тестирования или разработки.</text:span></text:p>
              </text:list-item>
              <text:list-item>
                <text:p text:style-name="P9"><text:span text:style-name="T5">Воздержитесь от политических заявлений и комментариев на протяжении всей встречи.</text:span></text:p>
              </text:list-item>
              <text:list-item>
                <text:p text:style-name="P9"><text:span text:style-name="T5">Мнения, высказанные на этой встрече, являются исключительно личными точками зрения выступающих.</text:span></text:p>
              </text:list-item>
            </text:list>
          </draw:text-box>
        </draw:frame>
        <presentation:notes draw:style-name="dp2">
          <draw:page-thumbnail draw:name="Google Shape;61;g3e099a1b415_2_53:notes" draw:style-name="gr3" draw:layer="layout" svg:width="16.932cm" svg:height="9.524cm" svg:x="1.059cm" svg:y="1.905cm" draw:page-number="2" presentation:class="page"/>
          <draw:frame draw:name="Google Shape;62;g3e099a1b415_2_53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 проходят встречи" draw:style-name="dp4" draw:master-page-name="TITLE_5f_AND_5f_BODY" presentation:presentation-page-layout-name="AL2T1">
        <draw:frame draw:name="Google Shape;70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Как проходят встречи</text:span></text:p>
          </draw:text-box>
        </draw:frame>
        <draw:frame draw:name="Google Shape;71;p15" presentation:style-name="pr5" draw:text-style-name="P10" draw:layer="layout" svg:width="23.667cm" svg:height="10.616cm" svg:x="0.685cm" svg:y="2.827cm" presentation:class="outline" presentation:user-transformed="true">
          <draw:text-box>
            <text:list text:style-name="L5">
              <text:list-item>
                <text:p text:style-name="P9"><text:span text:style-name="T5">Большая часть обновлений поступила после встречи biweekly, которая проводилась среди китайских разработчиков в прошлое воскресенье.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А также есть дополнения за последние три дня.</text:span></text:p>
                  </text:list-item>
                </text:list>
              </text:list-item>
              <text:list-item>
                <text:p text:style-name="P9"><text:span text:style-name="T5">Если вы хотите выступить с докладом, пожалуйста, свяжитесь с нами для получения прав на редактирование.</text:span></text:p>
                <text:list>
                  <text:list-item>
                    <text:p text:style-name="P9"><text:span text:style-name="T6">Telegram: @JeffBai, Discord: @mingcongbai</text:span></text:p>
                  </text:list-item>
                  <text:list-item>
                    <text:p text:style-name="P9"><text:span text:style-name="T6">Или просто сообщите об этом в групповых чатах!</text:span></text:p>
                  </text:list-item>
                  <text:list-item>
                    <text:p text:style-name="P9"><text:span text:style-name="T6">Вы можете вносить правки до начала встречи.</text:span></text:p>
                  </text:list-item>
                </text:list>
              </text:list-item>
              <text:list-item>
                <text:p text:style-name="P9"><text:span text:style-name="T5">Презентации будут на английском языке, но по запросу доступен перевод или пояснения на русском. После каждого блока мы будем оставлять немного времени на вопросы.</text:span></text:p>
                <text:list>
                  <text:list-item>
                    <text:p text:style-name="P9"><text:span text:style-name="T6">Если вы хотите помочь с переводом на другие языки, пожалуйста, сообщите нам.</text:span></text:p>
                  </text:list-item>
                </text:list>
              </text:list-item>
              <text:list-item>
                <text:p text:style-name="P9"><text:span text:style-name="T5">Встречи будут транслироваться в прямом эфире на YouTube…</text:span></text:p>
                <text:list>
                  <text:list-item>
                    <text:p text:style-name="P9"><text:span text:style-name="T6">…</text:span><text:span text:style-name="T6">а также будут доступны в записи на YouTube, VK и Bilibil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7;g3e1779161b9_19_0:notes" draw:style-name="gr3" draw:layer="layout" svg:width="16.932cm" svg:height="9.524cm" svg:x="1.059cm" svg:y="1.905cm" draw:page-number="3" presentation:class="page"/>
          <draw:frame draw:name="Google Shape;68;g3e1779161b9_19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звитие апстрима " draw:style-name="dp5" draw:master-page-name="SECTION_5f_HEADER">
        <draw:frame draw:name="Google Shape;76;p16" presentation:style-name="pr8" draw:text-style-name="P11" draw:layer="layout" svg:width="14.309cm" svg:height="5.151cm" svg:x="4.855cm" svg:y="3.914cm" presentation:class="title" presentation:user-transformed="true">
          <draw:text-box>
            <text:p text:style-name="P1"><text:span text:style-name="T7">Развитие апстрима </text:span></text:p>
          </draw:text-box>
        </draw:frame>
        <presentation:notes draw:style-name="dp2">
          <draw:page-thumbnail draw:name="Google Shape;73;g3dfcc34c27b_0_0:notes" draw:style-name="gr3" draw:layer="layout" svg:width="16.932cm" svg:height="9.524cm" svg:x="1.059cm" svg:y="1.905cm" draw:page-number="4" presentation:class="page"/>
          <draw:frame draw:name="Google Shape;74;g3dfcc34c27b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CC" draw:style-name="dp6" draw:master-page-name="TITLE_5f_AND_5f_BODY" presentation:presentation-page-layout-name="AL2T1">
        <draw:frame draw:name="Google Shape;81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GCC</text:span></text:p>
          </draw:text-box>
        </draw:frame>
        <draw:frame draw:name="Google Shape;82;p17" presentation:style-name="pr5" draw:text-style-name="P10" draw:layer="layout" svg:width="23.456cm" svg:height="11.582cm" svg:x="0.866cm" svg:y="2.599cm" presentation:class="outline" presentation:user-transformed="true">
          <draw:text-box>
            <text:list text:style-name="L5">
              <text:list-item>
                <text:p text:style-name="P9"><text:span text:style-name="T8">Zhou Qiankang</text:span><text:span text:style-name="T5">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<text:a xlink:href="https://gcc.gnu.org/cgit/gcc/commit/?id=61a39811893cf34794e6ffe5ab382882c6a5ddc0" xlink:type="simple">Исправлена</text:a></text:span><text:span text:style-name="T6"><text:s/>ошибка: невозможно было собрать GCC плагины из-за неустановленного внутреннего заголовочного файла </text:span><text:span text:style-name="T10">&lt;cpu-features.h&gt;</text:span><text:span text:style-name="T6">. Исправление было внесено и бэкпортировано в GCC 16.2. </text:span></text:p>
                  </text:list-item>
                </text:list>
              </text:list-item>
              <text:list-item>
                <text:p text:style-name="P9"><text:span text:style-name="T8">Xi Ruoyao</text:span><text:span text:style-name="T5">:</text:span></text:p>
                <text:list>
                  <text:list-item>
                    <text:p text:style-name="P9"><text:span text:style-name="T6">Патчи, </text:span><text:span text:style-name="T9"><text:a xlink:href="https://gcc.gnu.org/cgit/gcc/commit/?id=8535b42901bd772896fe4989efe5741ba5fc4bb9" xlink:type="simple">реализующие операцию spaceship</text:a></text:span><text:span text:style-name="T6"><text:s/>и </text:span><text:span text:style-name="T9"><text:a xlink:href="https://gcc.gnu.org/cgit/gcc/commit/?id=04677b1657d0ca24b52604d219e3a33532e25add" xlink:type="simple">оптимизирующие логическую операцию</text:a></text:span><text:span text:style-name="T6"><text:s/></text:span><text:span text:style-name="T10">a ^ b ^ (a | c) до (c &amp; ~a) ^ b</text:span><text:span text:style-name="T6">, о которых упоминалось на прошлой встрече, были доработаны и внесены.</text:span></text:p>
                  </text:list-item>
                  <text:list-item>
                    <text:p text:style-name="P9"><text:span text:style-name="T6">Патч, решающий проблему непредвиденного жизненного цикла переменных stack canary, о которой говорилось на прошлой встрече, был </text:span><text:span text:style-name="T9"><text:a xlink:href="https://gcc.gnu.org/cgit/gcc/commit/?id=7704f03d8a65874cedfb0b29a155213dcd822283" xlink:type="simple">бэкпортирован</text:a></text:span><text:span text:style-name="T6"><text:s/>в GCC 15.3. Перенос в GCC 14.4 и 13.5 ещё в процессе.</text:span></text:p>
                  </text:list-item>
                  <text:list-item>
                    <text:p text:style-name="P9"><text:span text:style-name="T10">rbit&lt;mode&gt;</text:span><text:span text:style-name="T6"> расширения были </text:span><text:span text:style-name="T9"><text:a xlink:href="https://gcc.gnu.org/cgit/gcc/commit/?id=82d9668ca6950419b1b00c0c4f8c9a87b6071051" xlink:type="simple">переименованы</text:a></text:span><text:span text:style-name="T6"><text:s/>в </text:span><text:span text:style-name="T10">bitreverse&lt;mode&gt;2</text:span><text:span text:style-name="T6"> для адаптации к новым встроенным функциям </text:span><text:span text:style-name="T11">__builtin_bitreverse{8,16,32,64}</text:span><text:span text:style-name="T6"> в GCC 17.</text:span></text:p>
                  </text:list-item>
                  <text:list-item>
                    <text:p text:style-name="P9"><text:span text:style-name="T9"><text:a xlink:href="https://gcc.gnu.org/bugzilla/show_bug.cgi?id=125291" xlink:type="simple">Обнаружено</text:a></text:span><text:span text:style-name="T6">, что GCC 16.1 некорректно компилирует код декодирования RAR из libarchive-3.8.7 на архитектуре LoongArch64; впоследствии ошибка была классифицирована как не зависящая от целевой архитектуры (target-independent). </text:span><text:span text:style-name="T9"><text:a xlink:href="https://gcc.gnu.org/cgit/gcc/commit/?id=26aae2119eb79bfbea23b86ea1a58f9a3a0911a6" xlink:type="simple">Исправление</text:a></text:span><text:span text:style-name="T6"><text:s/>было внесено и бэкпортировано в GCC 16.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8;g3e4555aee9c_2_0:notes" draw:style-name="gr3" draw:layer="layout" svg:width="16.932cm" svg:height="9.524cm" svg:x="1.059cm" svg:y="1.905cm" draw:page-number="5" presentation:class="page"/>
          <draw:frame draw:name="Google Shape;79;g3e4555aee9c_2_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CC (сообщили недавно)" draw:style-name="dp7" draw:master-page-name="TITLE_5f_AND_5f_BODY" presentation:presentation-page-layout-name="AL2T1">
        <draw:frame draw:name="Google Shape;87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GCC (сообщили недавно)</text:span></text:p>
          </draw:text-box>
        </draw:frame>
        <draw:frame draw:name="Google Shape;88;p18" presentation:style-name="pr5" draw:text-style-name="P10" draw:layer="layout" svg:width="23.456cm" svg:height="10.97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8">Jiajie Chen</text:span><text:span text:style-name="T5">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GCC не удается использовать инструкцию </text:span><text:span text:style-name="T10">xvmulwev.h.bu.b</text:span><text:span text:style-name="T6"> (и её аналоги) для оптимизации скалярных произведений (dot products), когда один вектор подвергается знаковому расширению, а другой — нулевому. </text:span></text:p>
                  </text:list-item>
                  <text:list-item>
                    <text:p text:style-name="P9"><text:span text:style-name="T6">Это вызывает </text:span><text:span text:style-name="T9"><text:a xlink:href="https://github.com/loongson-community/discussions/issues/119" xlink:type="simple">проблемы</text:a></text:span><text:span text:style-name="T9"><text:a xlink:href="https://github.com/loongson-community/discussions/issues/119" xlink:type="simple"> с производительностью</text:a></text:span><text:span text:style-name="T6"><text:s/>в SPEC CPU 2026 </text:span><text:span text:style-name="T10">706.stockfish_r</text:span><text:span text:style-name="T6">.</text:span></text:p>
                  </text:list-item>
                  <text:list-item>
                    <text:p text:style-name="P9"><text:span text:style-name="T6">Xi Ruoyao подготовил патч, который проходит регрессионное тестирование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4;g3e56a158dff_1_0:notes" draw:style-name="gr3" draw:layer="layout" svg:width="16.932cm" svg:height="9.524cm" svg:x="1.059cm" svg:y="1.905cm" draw:page-number="6" presentation:class="page"/>
          <draw:frame draw:name="Google Shape;85;g3e56a158dff_1_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LVM" draw:style-name="dp8" draw:master-page-name="TITLE_5f_AND_5f_BODY" presentation:presentation-page-layout-name="AL2T1">
        <draw:frame draw:name="Google Shape;93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LLVM</text:span></text:p>
          </draw:text-box>
        </draw:frame>
        <draw:frame draw:name="Google Shape;94;p19" presentation:style-name="pr5" draw:text-style-name="P10" draw:layer="layout" svg:width="25.152cm" svg:height="10.827cm" svg:x="0.123cm" svg:y="2.69cm" presentation:class="outline" presentation:user-transformed="true">
          <draw:text-box>
            <text:list text:style-name="L5">
              <text:list-item>
                <text:p text:style-name="P9"><text:span text:style-name="T8">heiher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Бэкпортирован коммит </text:span><text:span text:style-name="T9"><text:a xlink:href="https://github.com/llvm/llvm-project/commit/301e89fa4456a983d9b0c100e8b211a6551ad81a" xlink:type="simple">301e89f</text:a></text:span><text:span text:style-name="T6"><text:s/>из основной ветки в релизную ветку LLVM 22.x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6">Этот коммит отменил новое расширение, которое обрабатывает векторные операции с вычислением среднего значения. </text:span></text:p>
                      </text:list-item>
                      <text:list-item>
                        <text:p text:style-name="P9"><text:span text:style-name="T6">Предыдущая реализация не учитывала случай, когда сумма всех элементов переполняется в соответствующем типе, что приводило к неверным вычислениям.</text:span></text:p>
                      </text:list-item>
                    </text:list>
                  </text:list-item>
                  <text:list-item>
                    <text:p text:style-name="P9"><text:span text:style-name="T9"><text:a xlink:href="https://github.com/llvm/llvm-project/pull/198965" xlink:type="simple">Исправлена</text:a></text:span><text:span text:style-name="T6"><text:s/>ошибка, из-за которой стековый фрейм, содержащий любое временно выделенную составную переменную, передавался неявно как указатель и освобождался при указании </text:span><text:span text:style-name="T10">musttail</text:span><text:span text:style-name="T6">, что приводило к висячим ссылкам.</text:span></text:p>
                  </text:list-item>
                </text:list>
              </text:list-item>
              <text:list-item>
                <text:p text:style-name="P9"><text:span text:style-name="T8">hazohelet:</text:span><text:span text:style-name="T5"> </text:span></text:p>
                <text:list>
                  <text:list-item>
                    <text:p text:style-name="P9"><text:span text:style-name="T9"><text:a xlink:href="https://github.com/llvm/llvm-project/issues/198339" xlink:type="simple">Сообщает, что ICE (Internal Compiler Error)</text:a></text:span><text:span text:style-name="T6"><text:s/>может быть вызвана при выполнении операций векторного расширения половинной точности (</text:span><text:span text:style-name="T10">fpext &lt;N x half&gt;</text:span><text:span text:style-name="T6">) с включённой LSX, из-за неполного или некорректного расширени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0;g3e47dc072a6_2_9:notes" draw:style-name="gr3" draw:layer="layout" svg:width="16.932cm" svg:height="9.524cm" svg:x="1.059cm" svg:y="1.905cm" draw:page-number="7" presentation:class="page"/>
          <draw:frame draw:name="Google Shape;91;g3e47dc072a6_2_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Ядро Linux" draw:style-name="dp9" draw:master-page-name="TITLE_5f_AND_5f_BODY" presentation:presentation-page-layout-name="AL2T1">
        <draw:frame draw:name="Google Shape;99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Ядро Linux</text:span></text:p>
          </draw:text-box>
        </draw:frame>
        <draw:frame draw:name="Google Shape;100;p20" presentation:style-name="pr5" draw:text-style-name="P10" draw:layer="layout" svg:width="24.052cm" svg:height="10.29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Поддержка платформы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2">Tianyang Zheng</text:span><text:span text:style-name="T6">: Добавлена поддержка для для контроллеров перенаправления прерываний Loongson 3B/3C6000 (</text:span><text:span text:style-name="T9"><text:a xlink:href="https://lore.kernel.org/loongarch/20260513012839.2856463-1-zhangtianyang@loongson.cn/" xlink:type="simple">Ревизия 12</text:a></text:span><text:span text:style-name="T6">)</text:span></text:p>
                  </text:list-item>
                </text:list>
              </text:list-item>
              <text:list-item>
                <text:p text:style-name="P9"><text:span text:style-name="T5">Подсистема KVM </text:span></text:p>
                <text:list>
                  <text:list-item>
                    <text:p text:style-name="P9"><text:span text:style-name="T12">Bibo Mao</text:span><text:span text:style-name="T6">: Улучшен механизм инъекции прерываний и получения состояния прерываний, добавлена вспомогательная функция </text:span><text:span text:style-name="T10">kvm_vcpu_sync_intr()</text:span><text:span text:style-name="T6">, удалены такие функции с высокими накладными расходами, как </text:span><text:span text:style-name="T10">vcpu_{load,put}()</text:span><text:span text:style-name="T6"> (</text:span><text:span text:style-name="T9"><text:a xlink:href="https://lore.kernel.org/loongarch/20260522064945.614486-1-maobibo@loongson.cn/" xlink:type="simple">Ревизия 4</text:a></text:span><text:span text:style-name="T6">)</text:span></text:p>
                  </text:list-item>
                  <text:list-item>
                    <text:p text:style-name="P9"><text:span text:style-name="T12">Chi Zheng</text:span><text:span text:style-name="T6">: Добавлена отсутствующая логика блокировки kvm-&gt;slots_lock в регистрации устройства виртуального расширения EIONTC (</text:span><text:span text:style-name="T9"><text:a xlink:href="https://lore.kernel.org/loongarch/20260518094521.138692-1-zeng_chi911@163.com/" xlink:type="simple">Ревизия 1</text:a></text:span><text:span text:style-name="T6">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12">Bibo</text:span><text:span text:style-name="T6"> </text:span><text:span text:style-name="T9"><text:a xlink:href="https://lore.kernel.org/loongarch/af3e9ecc-cb30-6d7d-5f2d-19ddf42755a0@loongson.cn/" xlink:type="simple">отмечает</text:a></text:span><text:span text:style-name="T6">, что отсутствие защиты блокировками (как при вызове </text:span><text:span text:style-name="T10">kvm_io_bus_unregister_dev()</text:span><text:span text:style-name="T6">) также присутствует в файлах </text:span><text:span text:style-name="T6"><text:line-break/></text:span><text:span text:style-name="T6">pch_pic.c, ipi.c и eiontc.c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96;g3e47dc072a6_2_15:notes" draw:style-name="gr3" draw:layer="layout" svg:width="16.932cm" svg:height="9.524cm" svg:x="1.059cm" svg:y="1.905cm" draw:page-number="8" presentation:class="page"/>
          <draw:frame draw:name="Google Shape;97;g3e47dc072a6_2_15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Ядро Linux" draw:style-name="dp10" draw:master-page-name="TITLE_5f_AND_5f_BODY" presentation:presentation-page-layout-name="AL2T1">
        <draw:frame draw:name="Google Shape;105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Ядро Linux</text:span></text:p>
          </draw:text-box>
        </draw:frame>
        <draw:frame draw:name="Google Shape;106;p21" presentation:style-name="pr5" draw:text-style-name="P10" draw:layer="layout" svg:width="24.392cm" svg:height="10.291cm" svg:x="0.866cm" svg:y="3.201cm" presentation:class="outline" presentation:user-transformed="true">
          <draw:text-box>
            <text:list text:style-name="L10">
              <text:list-item>
                <text:p text:style-name="P9"><text:span text:style-name="T5">Прочие исправления кода и функций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12">Eric Biggers</text:span><text:span text:style-name="T6">: Добавить отсутствующую </text:span><text:span text:style-name="T10">опцию CRYPTO_RNG</text:span><text:span text:style-name="T6"> в запись Kconfig драйвера RNG Loongson (</text:span><text:span text:style-name="T10">CRYPTO_DEV_LOONGSON_RNG</text:span><text:span text:style-name="T6">), чтобы исправить ошибки сборки (</text:span><text:span text:style-name="T9"><text:a xlink:href="https://lore.kernel.org/loongarch/20260522022525.12976-1-ebiggers@kernel.org/" xlink:type="simple">Ревизия 1</text:a></text:span><text:span text:style-name="T6">)</text:span></text:p>
                  </text:list-item>
                  <text:list-item>
                    <text:p text:style-name="P9"><text:span text:style-name="T12">Bibo Mao</text:span><text:span text:style-name="T6">: Удалить ненужную инъекцию прерываний таймера при истечении </text:span><text:span text:style-name="T6"><text:line-break/></text:span><text:span text:style-name="T6">программного таймера (</text:span><text:span text:style-name="T9"><text:a xlink:href="https://lore.kernel.org/loongarch/20260513015525.1152240-1-maobibo@loongson.cn/" xlink:type="simple">Ревизия 2</text:a></text:span><text:span text:style-name="T6">)</text:span></text:p>
                  </text:list-item>
                  <text:list-item>
                    <text:p text:style-name="P9"><text:span text:style-name="T12">Rui Wang</text:span><text:span text:style-name="T6">: Переместить логику KASLR в заглушку (stub) EFI, что уменьшает перекрытие сегментов памяти между initrd и службами загрузки/ядром (которое может приводить к </text:span><text:span text:style-name="T6"><text:line-break/></text:span><text:span text:style-name="T6">сбоям загрузки) (</text:span><text:span text:style-name="T9"><text:a xlink:href="https://lore.kernel.org/loongarch/20260511104555.196270-1-r@hev.cc/" xlink:type="simple">Ревизия 5</text:a></text:span><text:span text:style-name="T6">)</text:span></text:p>
                  </text:list-item>
                  <text:list-item>
                    <text:p text:style-name="P9"><text:span text:style-name="T12">Tiezhu Yang</text:span><text:span text:style-name="T6">: Исправить несколько функциональных проблем в ftrace и kprobes (</text:span><text:span text:style-name="T9"><text:a xlink:href="https://lore.kernel.org/loongarch/20260512082029.2131-1-yangtiezhu@loongson.cn/" xlink:type="simple">Ревизия 1</text:a></text:span><text:span text:style-name="T6">)</text:span></text:p>
                  </text:list-item>
                  <text:list-item>
                    <text:p text:style-name="P9"><text:span text:style-name="T12">Tiezhu Yang</text:span><text:span text:style-name="T6">: Исправить несколько ошибок с хвостовыми вызовами в подсистеме BPF, все модульные тесты проходят успешно (</text:span><text:span text:style-name="T9"><text:a xlink:href="https://lore.kernel.org/loongarch/20260521070128.28086-1-yangtiezhu@loongson.cn/" xlink:type="simple">Ревизия 1</text:a></text:span><text:span text:style-name="T6">)</text:span></text:p>
                  </text:list-item>
                </text:list>
              </text:list-item>
              <text:list-item>
                <text:p text:style-name="P9"><text:span text:style-name="T5">Очистка кода и рефакторинг</text:span></text:p>
                <text:list>
                  <text:list-item>
                    <text:p text:style-name="P9"><text:span text:style-name="T12">Huacai Chen</text:span><text:span text:style-name="T6">: Удалить неиспользуемую переменную страницу в коде управления памятью для подавления предупреждений компилятора (</text:span><text:span text:style-name="T9"><text:a xlink:href="https://lore.kernel.org/loongarch/20260517092432.1025008-1-chenhuacai@loongson.cn/" xlink:type="simple">Ревизия 1</text:a></text:span><text:span text:style-name="T6">)</text:span></text:p>
                  </text:list-item>
                  <text:list-item>
                    <text:p text:style-name="P9"><text:span text:style-name="T12">Ethan Nelson-Moore</text:span><text:span text:style-name="T6">: Удалить </text:span><text:span text:style-name="T10">arch/loongarch/crypto</text:span><text:span text:style-name="T6">, так как больше </text:span><text:span text:style-name="T6"><text:line-break/></text:span><text:span text:style-name="T6">не используется (</text:span><text:span text:style-name="T9"><text:a xlink:href="https://lore.kernel.org/loongarch/20260517031430.102984-1-enelsonmoore@gmail.com/" xlink:type="simple">Ревизия 1</text:a>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2;g3e47dc072a6_2_21:notes" draw:style-name="gr3" draw:layer="layout" svg:width="16.932cm" svg:height="9.524cm" svg:x="1.059cm" svg:y="1.905cm" draw:page-number="9" presentation:class="page"/>
          <draw:frame draw:name="Google Shape;103;g3e47dc072a6_2_21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x64" draw:style-name="dp11" draw:master-page-name="TITLE_5f_AND_5f_BODY" presentation:presentation-page-layout-name="AL2T1">
        <draw:frame draw:name="Google Shape;111;p22" presentation:style-name="pr4" draw:text-style-name="P8" draw:layer="layout" svg:width="23.667cm" svg:height="1.59cm" svg:x="0.866cm" svg:y="0cm" presentation:class="title" presentation:user-transformed="true">
          <draw:text-box>
            <text:p text:style-name="P1"><text:span text:style-name="T4">Box64</text:span></text:p>
          </draw:text-box>
        </draw:frame>
        <draw:frame draw:name="Google Shape;112;p22" presentation:style-name="pr5" draw:text-style-name="P10" draw:layer="layout" svg:width="24.402cm" svg:height="11.416cm" svg:x="0.866cm" svg:y="2.076cm" presentation:class="outline" presentation:user-transformed="true">
          <draw:text-box>
            <text:list text:style-name="L5">
              <text:list-item>
                <text:p text:style-name="P9"><text:span text:style-name="T13">Выпущена Box64 0.4.3-2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4">В этом релизе исправлена ошибка, из-за которой игры в Steam недавно перестали запускаться</text:span><text:span text:style-name="T6">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9"><text:span text:style-name="T14">Остальные пункты, перечисленные ниже, рассматриваются как предстоящие функции и исправления</text:span><text:span text:style-name="T6">.</text:span></text:p>
                  </text:list-item>
                </text:list>
              </text:list-item>
              <text:list-item>
                <text:p text:style-name="P9"><text:span text:style-name="T13">Поддержка Wine</text:span></text:p>
                <text:list>
                  <text:list-item>
                    <text:p text:style-name="P9"><text:span text:style-name="T14">Эмулируемая диспетчеризация пользователей системных вызовов для Wine 11.5+.</text:span></text:p>
                  </text:list-item>
                  <text:list-item>
                    <text:p text:style-name="P9"><text:span text:style-name="T14">Добавлены обёртки расширения Vulkan для поддержки Wine 11.9.</text:span></text:p>
                  </text:list-item>
                  <text:list-item>
                    <text:p text:style-name="P9"><text:span text:style-name="T14">Исправлен баг защиты памяти, возникавший в Wine 11.9.</text:span></text:p>
                  </text:list-item>
                </text:list>
              </text:list-item>
            </text:list>
            <text:list text:style-name="L13">
              <text:list-item>
                <text:p text:style-name="P9"><text:span text:style-name="T13">Добавлено больше обёрток для библиотек и функций (SDL1, libGL, Vulkan, …), </text:span><text:span text:style-name="T13"><text:line-break/></text:span><text:span text:style-name="T13">в том числе</text:span><text:span text:style-name="T15">: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14">Добавлены обёртки для библиотеки SDL1 в Box32, что позволяет запускать 32-битную игру </text:span><text:span text:style-name="T16">Psychonauts</text:span><text:span text:style-name="T17">.</text:span></text:p>
                  </text:list-item>
                </text:list>
              </text:list-item>
            </text:list>
            <text:list text:style-name="L15">
              <text:list-item>
                <text:p text:style-name="P9"><text:span text:style-name="T13">Оптимизация отложенных сигналов:</text:span></text:p>
              </text:list-item>
            </text:list>
            <text:list text:style-name="L16">
              <text:list-item>
                <text:list>
                  <text:list-item>
                    <text:p text:style-name="P9"><text:span text:style-name="T14">Сигналы, возникающие во время критических секций, теперь записываются и воспроизводятся впоследствии, что позволяет избежать зависимости от (медленного) маскирования сигналов Linux.</text:span></text:p>
                  </text:list-item>
                  <text:list-item>
                    <text:p text:style-name="P9"><text:span text:style-name="T14">На 3B6000 время запуска explorer.exe в Wine 11.9 ускорилось на 60%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8;g3e56a158dff_1_55:notes" draw:style-name="gr3" draw:layer="layout" svg:width="16.932cm" svg:height="9.524cm" svg:x="1.059cm" svg:y="1.905cm" draw:page-number="10" presentation:class="page"/>
          <draw:frame draw:name="Google Shape;109;g3e56a158dff_1_55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x64" draw:style-name="dp12" draw:master-page-name="TITLE_5f_AND_5f_BODY" presentation:presentation-page-layout-name="AL2T1">
        <draw:frame draw:name="Google Shape;117;p23" presentation:style-name="pr4" draw:text-style-name="P8" draw:layer="layout" svg:width="23.667cm" svg:height="1.59cm" svg:x="0.572cm" svg:y="0.387cm" presentation:class="title" presentation:user-transformed="true">
          <draw:text-box>
            <text:p text:style-name="P1"><text:span text:style-name="T4">Box64</text:span></text:p>
          </draw:text-box>
        </draw:frame>
        <draw:frame draw:name="Google Shape;118;p23" presentation:style-name="pr16" draw:text-style-name="P10" draw:layer="layout" svg:width="24.726cm" svg:height="11.514cm" svg:x="0.34cm" svg:y="1.978cm" presentation:class="outline" presentation:user-transformed="true">
          <draw:text-box>
            <text:list text:style-name="L5">
              <text:list-item>
                <text:p text:style-name="P13"><text:span text:style-name="T5">Улучшения кэширования файлов кода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Улучшена логика управления версиями файлов: теперь строка версии автоматически генерируется на основе содержимого файла, что позволяет различать файловые кэши.</text:span></text:p>
                  </text:list-item>
                  <text:list-item>
                    <text:p text:style-name="P9"><text:span text:style-name="T6">Оптимизирована загрузка кэша кода: пропускаются устаревшие блоки кода.</text:span></text:p>
                  </text:list-item>
                  <text:list-item>
                    <text:p text:style-name="P9"><text:span text:style-name="T6">Исправлен баг, из-за которого утилита CLI для кэша кода некорректно определяла эмулируемые расширения CPU.</text:span></text:p>
                  </text:list-item>
                  <text:list-item>
                    <text:p text:style-name="P9"><text:span text:style-name="T6">Добавлена поддержка сжатия файлов кэша кода (уровень сжатия 1 включён по умолчанию)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6">Время запуска </text:span><text:span text:style-name="T18">Factorio</text:span><text:span text:style-name="T6"> при включённом сжатии практически не изменилось, при этом размер кэша кода сократился с 205MiB до 55MiB.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9"><text:span text:style-name="T19">Усовершенствован LRU-механизм кэширования: временная метка использования теперь обновляется при каждом обращении в кэш.</text:span></text:p>
                  </text:list-item>
                </text:list>
              </text:list-item>
            </text:list>
            <text:list text:style-name="L18">
              <text:list-item>
                <text:p text:style-name="P9"><text:span text:style-name="T5">Улучшения динамического рекомпилятора для LoongArch64</text:span><text:span text:style-name="T20">:</text:span></text:p>
                <text:list>
                  <text:list-item>
                    <text:p text:style-name="P9"><text:span text:style-name="T6">Оптимизирована реализация AES с использованием алгоритма </text:span><text:span text:style-name="T10">VPAES</text:span><text:span text:style-name="T6">, что значительно ускорило шифрование и дешифрование</text:span><text:span text:style-name="T19">.</text:span></text:p>
                  </text:list-item>
                  <text:list-item>
                    <text:p text:style-name="P9"><text:span text:style-name="T6">Скорость декомпрессии выросла в 5 раз согласно тестированию 7-zip самораспоковывающегося архива</text:span><text:span text:style-name="T1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4;g3e56a158dff_1_111:notes" draw:style-name="gr3" draw:layer="layout" svg:width="16.932cm" svg:height="9.524cm" svg:x="1.059cm" svg:y="1.905cm" draw:page-number="11" presentation:class="page"/>
          <draw:frame draw:name="Google Shape;115;g3e56a158dff_1_111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x64" draw:style-name="dp13" draw:master-page-name="TITLE_5f_AND_5f_BODY" presentation:presentation-page-layout-name="AL2T1">
        <draw:frame draw:name="Google Shape;123;p24" presentation:style-name="pr4" draw:text-style-name="P8" draw:layer="layout" svg:width="23.667cm" svg:height="1.59cm" svg:x="0.376cm" svg:y="0.354cm" presentation:class="title" presentation:user-transformed="true">
          <draw:text-box>
            <text:p text:style-name="P1"><text:span text:style-name="T4">Box64</text:span></text:p>
          </draw:text-box>
        </draw:frame>
        <draw:frame draw:name="Google Shape;124;p24" presentation:style-name="pr16" draw:text-style-name="P10" draw:layer="layout" svg:width="24.788cm" svg:height="11.547cm" svg:x="0.376cm" svg:y="1.945cm" presentation:class="outline" presentation:user-transformed="true">
          <draw:text-box>
            <text:list text:style-name="L19">
              <text:list-item>
                <text:p text:style-name="P9"><text:span text:style-name="T5">Прочие исправления и улучшения</text:span></text:p>
              </text:list-item>
            </text:list>
            <text:list text:style-name="L20">
              <text:list-item>
                <text:list>
                  <text:list-item>
                    <text:p text:style-name="P9"><text:span text:style-name="T21">Добавлена обертка для интерпретатора Python, чтобы у </text:span><text:span text:style-name="T22">platform.machine()</text:span><text:span text:style-name="T21"> получилось вернуть </text:span><text:span text:style-name="T22">x86_64</text:span><text:span text:style-name="T21">, когда скрипты выполняются в нативном интерпретаторе.</text:span></text:p>
                  </text:list-item>
                  <text:list-item>
                    <text:p text:style-name="P9"><text:span text:style-name="T21">Оптимизирована функция </text:span><text:span text:style-name="T22">add_next</text:span><text:span text:style-name="T21"> для обнаружения кода в режиме больших блоков с использованием хеш-таблицы.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9"><text:span text:style-name="T21">Измеренное время запуска Wine explorer ускорилось ещё на 30%.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9"><text:span text:style-name="T21">Исправлена ошибка декодирования с префиксом инструкции </text:span><text:span text:style-name="T22">0x66</text:span><text:span text:style-name="T21"> в интерпретаторе Box64</text:span><text:span text:style-name="T23">.</text:span></text:p>
                  </text:list-item>
                  <text:list-item>
                    <text:p text:style-name="P9"><text:span text:style-name="T21">Улучшена обработка недопустимых комбинаций инструкции </text:span><text:span text:style-name="T22">MOVNT</text:span><text:span text:style-name="T23">.</text:span></text:p>
                  </text:list-item>
                  <text:list-item>
                    <text:p text:style-name="P9"><text:span text:style-name="T21">Исправлен баг, из-за которого инструкции LASX случайно выбирались, когда процессор поддерживает только LSX</text:span><text:span text:style-name="T23">.</text:span></text:p>
                  </text:list-item>
                  <text:list-item>
                    <text:p text:style-name="P9"><text:span text:style-name="T21">Добавлена поддержка режима округления </text:span><text:span text:style-name="T22">fastround-2</text:span><text:span text:style-name="T21"> для совместимости с бэкендом ARM</text:span><text:span text:style-name="T23">.</text:span></text:p>
                  </text:list-item>
                  <text:list-item>
                    <text:p text:style-name="P9"><text:span text:style-name="T21">Расширен декодер для поддержки нескольких 16-битных инструкций</text:span><text:span text:style-name="T23">.</text:span></text:p>
                  </text:list-item>
                  <text:list-item>
                    <text:p text:style-name="P9"><text:span text:style-name="T21">Исправлены некоторые пограничные кейсы (edge cases)</text:span><text:span text:style-name="T24"> </text:span><text:span text:style-name="T21">в вычислениях с участием </text:span><text:span text:style-name="T21"><text:line-break/></text:span><text:span text:style-name="T21">нескольких инструкций x87</text:span><text:span text:style-name="T23">.</text:span></text:p>
                  </text:list-item>
                  <text:list-item>
                    <text:p text:style-name="P9"><text:span text:style-name="T21">Добавлена поддержка именованных символов для переноса/перемещения </text:span><text:span text:style-name="T22">R_X86_64_TLSDESC</text:span><text:span text:style-name="T2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0;g3e56a158dff_1_168:notes" draw:style-name="gr3" draw:layer="layout" svg:width="16.932cm" svg:height="9.524cm" svg:x="1.059cm" svg:y="1.905cm" draw:page-number="12" presentation:class="page"/>
          <draw:frame draw:name="Google Shape;121;g3e56a158dff_1_16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x64" draw:style-name="dp14" draw:master-page-name="TITLE_5f_AND_5f_BODY" presentation:presentation-page-layout-name="AL2T1">
        <draw:frame draw:name="Google Shape;129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Box64</text:span></text:p>
          </draw:text-box>
        </draw:frame>
        <draw:frame draw:name="Google Shape;130;p25" presentation:style-name="pr5" draw:text-style-name="P10" draw:layer="layout" svg:width="23.667cm" svg:height="10.29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Прочие исправления и улучшения (продолжение)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Исправлен потенциальный конфликт регистров между оптимизациями </text:span><text:span text:style-name="T10">nativeflags</text:span><text:span text:style-name="T6"> и режимом Trace.</text:span></text:p>
                  </text:list-item>
                  <text:list-item>
                    <text:p text:style-name="P9"><text:span text:style-name="T6">Проведён рефакторинг управления устаревшими блоками: сложная устаревшая логика заменена на более простой кольцевой FIFO-буфер для кэширования блоков кода, что повышает безопасность.</text:span></text:p>
                  </text:list-item>
                  <text:list-item>
                    <text:p text:style-name="P9"><text:span text:style-name="T6">Добавлен профиль для Call of Duty 4, включающий необходимые опции безопасности и предотвращающий вылеты из-за излишней оптимизации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6;g3e47dc072a6_2_41:notes" draw:style-name="gr3" draw:layer="layout" svg:width="16.932cm" svg:height="9.524cm" svg:x="1.059cm" svg:y="1.905cm" draw:page-number="13" presentation:class="page"/>
          <draw:frame draw:name="Google Shape;127;g3e47dc072a6_2_41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en (форк Yuzu — эмулятора Nintendo Switch)" draw:style-name="dp15" draw:master-page-name="TITLE_5f_AND_5f_BODY" presentation:presentation-page-layout-name="AL2T1">
        <draw:frame draw:name="Google Shape;135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25">Eden (форк Yuzu — эмулятора Nintendo Switch)</text:span></text:p>
          </draw:text-box>
        </draw:frame>
        <draw:frame draw:name="Google Shape;136;p26" presentation:style-name="pr5" draw:text-style-name="P10" draw:layer="layout" svg:width="23.667cm" svg:height="10.291cm" svg:x="0.866cm" svg:y="3.201cm" presentation:class="outline" presentation:user-transformed="true">
          <draw:text-box>
            <text:list text:style-name="L5">
              <text:list-item>
                <text:p text:style-name="P14"><text:span text:style-name="T5">Eden является форком Yuzu (эмулятора Nintendo Switch) и размещается на </text:span><text:span text:style-name="T26"><text:a xlink:href="https://git.eden-emu.dev/eden-emu/eden" xlink:type="simple">собственном экземпляре Forgejo</text:a></text:span><text:span text:style-name="T5">.</text:span></text:p>
              </text:list-item>
              <text:list-item>
                <text:p text:style-name="P9"><text:span text:style-name="T5">Добавлена начальная (bootstrap) поддержка архитектуры LoongArch.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Отправлен </text:span><text:span text:style-name="T9"><text:a xlink:href="https://git.eden-emu.dev/eden-emu/eden/pulls/4015" xlink:type="simple">первый PR</text:a></text:span><text:span text:style-name="T6">, следующий PR (базовая реализация JIT) готов к отправке.</text:span></text:p>
                  </text:list-item>
                  <text:list-item>
                    <text:p text:style-name="P9"><text:span text:style-name="T6">Рабочая версия планируется в этом году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2;g3e56a158dff_1_223:notes" draw:style-name="gr3" draw:layer="layout" svg:width="16.932cm" svg:height="9.524cm" svg:x="1.059cm" svg:y="1.905cm" draw:page-number="14" presentation:class="page"/>
          <draw:frame draw:name="Google Shape;133;g3e56a158dff_1_223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ctor Packet Processing" draw:style-name="dp16" draw:master-page-name="TITLE_5f_AND_5f_BODY" presentation:presentation-page-layout-name="AL2T1">
        <draw:frame draw:name="Google Shape;141;p27" presentation:style-name="pr4" draw:text-style-name="P8" draw:layer="layout" svg:width="23.667cm" svg:height="1.59cm" svg:x="0.427cm" svg:y="0.454cm" presentation:class="title" presentation:user-transformed="true">
          <draw:text-box>
            <text:p text:style-name="P1"><text:span text:style-name="T4">Vector Packet Processing</text:span></text:p>
          </draw:text-box>
        </draw:frame>
        <draw:frame draw:name="Google Shape;142;p27" presentation:style-name="pr5" draw:text-style-name="P10" draw:layer="layout" svg:width="24.106cm" svg:height="10.665cm" svg:x="0.427cm" svg:y="2.526cm" presentation:class="outline" presentation:user-transformed="true">
          <draw:text-box>
            <text:list text:style-name="L5">
              <text:list-item>
                <text:p text:style-name="P9"><text:span text:style-name="T5">Vector Packet Processing (VPP), высокопроизводительная библиотека для обработки сетевых пакетов, </text:span><text:span text:style-name="T26"><text:a xlink:href="https://github.com/ksco/vpp/commits/loong64/" xlink:type="simple">получает</text:a></text:span><text:span text:style-name="T5"><text:s/>поддержку LoongArch64 благодаря </text:span><text:span text:style-name="T8">Liu Yang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Полезно для сетевых приложений и устройств, таких как программные маршрутизаторы, межсетевые экраны и высокопроизводительные маршрутизаторы, обеспечивая векторно-ускоренную обработку данных.</text:span></text:p>
                  </text:list-item>
                  <text:list-item>
                    <text:p text:style-name="P9"><text:span text:style-name="T6">Этот порт для LoongArch64 позволит использовать больше приложений в качестве сетевых бэкендов.</text:span></text:p>
                  </text:list-item>
                  <text:list-item>
                    <text:p text:style-name="P9"><text:span text:style-name="T6">Для всех заинтересованных — пожалуйста, используйте этот порт и дайте свой фидбэк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8;g3e47dc072a6_2_46:notes" draw:style-name="gr3" draw:layer="layout" svg:width="16.932cm" svg:height="9.524cm" svg:x="1.059cm" svg:y="1.905cm" draw:page-number="15" presentation:class="page"/>
          <draw:frame draw:name="Google Shape;139;g3e47dc072a6_2_46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чие обновления (задачи сообщества)" draw:style-name="dp17" draw:master-page-name="TITLE_5f_AND_5f_BODY" presentation:presentation-page-layout-name="AL2T1">
        <draw:frame draw:name="Google Shape;147;p28" presentation:style-name="pr4" draw:text-style-name="P8" draw:layer="layout" svg:width="23.667cm" svg:height="1.59cm" svg:x="0.535cm" svg:y="0.574cm" presentation:class="title" presentation:user-transformed="true">
          <draw:text-box>
            <text:p text:style-name="P1"><text:span text:style-name="T4">Прочие обновления (задачи сообщества)</text:span></text:p>
          </draw:text-box>
        </draw:frame>
        <draw:frame draw:name="Google Shape;148;p28" presentation:style-name="pr5" draw:text-style-name="P10" draw:layer="layout" svg:width="24.669cm" svg:height="11.134cm" svg:x="0.397cm" svg:y="2.358cm" presentation:class="outline" presentation:user-transformed="true">
          <draw:text-box>
            <text:list text:style-name="L5">
              <text:list-item>
                <text:p text:style-name="P9"><text:span text:style-name="T8">elysia-best</text:span><text:span text:style-name="T5"> </text:span><text:span text:style-name="T26"><text:a xlink:href="https://github.com/electerm/electerm/issues/4344" xlink:type="simple">сообщает</text:a></text:span><text:span text:style-name="T5">, что пакеты .deb для LoongArch64 из проекта electerm невозможно установить на Debian 13 из-за несовместимых имен архитектуры, указанных в метаданных пакета.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В .deb-пакетах, поставляемых electerm, в качестве имени архитектуры используется </text:span><text:span text:style-name="T10">loongarch64</text:span><text:span text:style-name="T6">, в то время как Debian распознаёт только </text:span><text:span text:style-name="T10">loong64</text:span><text:span text:style-name="T6">. Мы подозреваем, что пакеты собраны на AOSC ОС.</text:span></text:p>
                  </text:list-item>
                  <text:list-item>
                    <text:p text:style-name="P9"><text:span text:style-name="T6">Разработчики позже заявили, что опубликуют пакеты .deb с двумя вариантами </text:span><text:span text:style-name="T6"><text:line-break/></text:span><text:span text:style-name="T6">имени архитектуры.</text:span></text:p>
                  </text:list-item>
                </text:list>
              </text:list-item>
              <text:list-item>
                <text:p text:style-name="P9"><text:span text:style-name="T5">bitm-cn </text:span><text:span text:style-name="T26"><text:a xlink:href="https://github.com/eclipse-equinox/equinox/issues/1295" xlink:type="simple">сообщил</text:a></text:span><text:span text:style-name="T5">, что при портировании Eclipse Equinox на платформу LoongArch64 инструмент упаковки Tycho не может найти фрагменты загрузчика для LoongArch64, установленные в локальном репозитории, что приводит к сбоям сборки.</text:span></text:p>
                <text:list>
                  <text:list-item>
                    <text:p text:style-name="P9"><text:span text:style-name="T6">bitm-cn также запросил у апстримовских разработчиков инструкции по добавлению поддержки для новой архитектуры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4;g3e4a131875a_0_125:notes" draw:style-name="gr3" draw:layer="layout" svg:width="16.932cm" svg:height="9.524cm" svg:x="1.059cm" svg:y="1.905cm" draw:page-number="16" presentation:class="page"/>
          <draw:frame draw:name="Google Shape;145;g3e4a131875a_0_12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чие обновления (вклад участников)" draw:style-name="dp18" draw:master-page-name="TITLE_5f_AND_5f_BODY" presentation:presentation-page-layout-name="AL2T1">
        <draw:frame draw:name="Google Shape;153;p2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Прочие обновления (вклад участников)</text:span></text:p>
          </draw:text-box>
        </draw:frame>
        <draw:frame draw:name="Google Shape;154;p29" presentation:style-name="pr5" draw:text-style-name="P10" draw:layer="layout" svg:width="22.015cm" svg:height="10.291cm" svg:x="1.875cm" svg:y="3.201cm" presentation:class="outline" presentation:user-transformed="true">
          <draw:text-box>
            <text:list text:style-name="L10">
              <text:list-item>
                <text:p text:style-name="P9"><text:span text:style-name="T8">emmasun</text:span><text:span text:style-name="T5">: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6">Реализованы оптимизации LSX/LASX для алгоритмов </text:span><text:span text:style-name="T9"><text:a xlink:href="https://github.com/emmansun/gmsm/issues/501" xlink:type="simple">ML-DSA</text:a></text:span><text:span text:style-name="T6"><text:s/>и </text:span><text:span text:style-name="T9"><text:a xlink:href="https://github.com/emmansun/gmsm/issues/500" xlink:type="simple">ML-KEM</text:a></text:span><text:span text:style-name="T6"><text:s/>для коммерческой криптографической (Shangmi) библиотеки </text:span><text:span text:style-name="T9"><text:a xlink:href="https://github.com/emmansun/gmsm" xlink:type="simple">gmsm</text:a></text:span><text:span text:style-name="T6">, написанной на Go.</text:span></text:p>
                  </text:list-item>
                  <text:list-item>
                    <text:p text:style-name="P9"><text:span text:style-name="T6">Реализация охватывает различные операции с</text:span><text:span text:style-name="T27"> </text:span><text:span text:style-name="T6">полиномами, такие как базовые вычисления и NTT, добавляет новый код кодирования и планирования, а также различный код на ассемблере.</text:span></text:p>
                  </text:list-item>
                </text:list>
              </text:list-item>
              <text:list-item>
                <text:p text:style-name="P9"><text:span text:style-name="T8">nihui</text:span><text:span text:style-name="T5">:</text:span></text:p>
                <text:list>
                  <text:list-item>
                    <text:p text:style-name="P9"><text:span text:style-name="T9"><text:a xlink:href="https://github.com/Tencent/ncnn/pull/6737" xlink:type="simple">Добавлена поддержка обработки 4D-тензоров</text:a></text:span><text:span text:style-name="T6"><text:s/>для нескольких операторов в фреймворке для машинного обучения NCNN. </text:span></text:p>
                  </text:list-item>
                  <text:list-item>
                    <text:p text:style-name="P9"><text:span text:style-name="T6">Эта реализация задействует LSX/LASX для ускорения производительности </text:span><text:span text:style-name="T6"><text:line-break/></text:span><text:span text:style-name="T6">во время исполнения.</text:span></text:p>
                  </text:list-item>
                </text:list>
              </text:list-item>
              <text:list-item>
                <text:p text:style-name="P9"><text:span text:style-name="T8">doruche</text:span><text:span text:style-name="T5">:</text:span></text:p>
                <text:list>
                  <text:list-item>
                    <text:p text:style-name="P9"><text:span text:style-name="T6">В ядро Anemone добавлены новые системные вызовы, обрабатывающие мьютексы пользовательского пространства (futexes), интервальные таймеры, ввод-вывод и учётные данные (credentials).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name="Google Shape;150;g3e4a131875a_0_175:notes" draw:style-name="gr3" draw:layer="layout" svg:width="16.932cm" svg:height="9.524cm" svg:x="1.059cm" svg:y="1.905cm" draw:page-number="17" presentation:class="page"/>
          <draw:frame draw:name="Google Shape;151;g3e4a131875a_0_175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чие обновления (вклад участников)" draw:style-name="dp19" draw:master-page-name="TITLE_5f_AND_5f_BODY" presentation:presentation-page-layout-name="AL2T1">
        <draw:frame draw:name="Google Shape;159;p3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Прочие обновления (вклад участников)</text:span></text:p>
          </draw:text-box>
        </draw:frame>
        <draw:frame draw:name="Google Shape;160;p30" presentation:style-name="pr5" draw:text-style-name="P10" draw:layer="layout" svg:width="23.667cm" svg:height="10.291cm" svg:x="0.866cm" svg:y="3.201cm" presentation:class="outline" presentation:user-transformed="true">
          <draw:text-box>
            <text:list text:style-name="L10">
              <text:list-item>
                <text:p text:style-name="P9"><text:span text:style-name="T8">Gelbpunkt</text:span><text:span text:style-name="T5">: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9"><text:a xlink:href="https://github.com/trifectatechfoundation/zlib-rs/pull/511" xlink:type="simple">Реализованы аппаратно ускоренные операции CRC32</text:a></text:span><text:span text:style-name="T6"><text:s/>с использованием встроенных инструкций CRC в архитектуре LoongArch64 для библиотеки zlib-rs — реализации zlib, написанной на Rust. </text:span></text:p>
                  </text:list-item>
                  <text:list-item>
                    <text:p text:style-name="P9"><text:span text:style-name="T6">Реализация основана на встроенных блоках ассемблера вместо встроенных функций компилятора (интринсиков), так как интринсики нестабильны в Rust; также планируются дальнейшие улучшения </text:span><text:span text:style-name="T10">std::arch</text:span><text:span text:style-name="T6">.</text:span></text:p>
                  </text:list-item>
                  <text:list-item>
                    <text:p text:style-name="P9"><text:span text:style-name="T6">Исправлена проблема, из-за которой отсутствие каталога, специфичного для LoongArch64, приводило к ошибке CMake при сборке zlib-ng для крейта zlib-sys.</text:span></text:p>
                  </text:list-item>
                </text:list>
              </text:list-item>
              <text:list-item>
                <text:p text:style-name="P9"><text:span text:style-name="T8">numpy1314</text:span><text:span text:style-name="T5">:</text:span></text:p>
                <text:list>
                  <text:list-item>
                    <text:p text:style-name="P9"><text:span text:style-name="T9"><text:a xlink:href="https://github.com/Hengyu-Yu/QEMU-LVZ/pull/2" xlink:type="simple">Исправлена ошибка для QEMU-LVZ</text:a></text:span><text:span text:style-name="T6"><text:s/>(форка QEMU с поддержкой виртуализации LoongArch64), когда биты флагов случайно вовлекаются в вычисления физического адреса во вспомогательных функциях </text:span><text:span text:style-name="T10">lddir/ldpte</text:span><text:span text:style-name="T6">, в результате чего возникают ошибки при итерации таблиц страниц.</text:span></text:p>
                  </text:list-item>
                  <text:list-item>
                    <text:p text:style-name="P9"><text:span text:style-name="T6">Исправление также было выдвинуто в проекте </text:span><text:span text:style-name="T9"><text:a xlink:href="https://github.com/rcore-os" xlink:type="simple">rcore-os</text:a></text:span><text:span text:style-name="T6">.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name="Google Shape;156;g3e4a131875a_0_235:notes" draw:style-name="gr3" draw:layer="layout" svg:width="16.932cm" svg:height="9.524cm" svg:x="1.059cm" svg:y="1.905cm" draw:page-number="18" presentation:class="page"/>
          <draw:frame draw:name="Google Shape;157;g3e4a131875a_0_235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чие обновления (вклад участников)" draw:style-name="dp20" draw:master-page-name="TITLE_5f_AND_5f_BODY" presentation:presentation-page-layout-name="AL2T1">
        <draw:frame draw:name="Google Shape;165;p3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Прочие обновления (вклад участников)</text:span></text:p>
          </draw:text-box>
        </draw:frame>
        <draw:frame draw:name="Google Shape;166;p31" presentation:style-name="pr5" draw:text-style-name="P10" draw:layer="layout" svg:width="24.513cm" svg:height="10.291cm" svg:x="0.277cm" svg:y="3.201cm" presentation:class="outline" presentation:user-transformed="true">
          <draw:text-box>
            <text:list text:style-name="L5">
              <text:list-item>
                <text:p text:style-name="P9"><text:span text:style-name="T8">numpy1314</text:span><text:span text:style-name="T5">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<text:a xlink:href="https://github.com/rcore-os/tgoskits/pull/768" xlink:type="simple">Добавлена минимальная поддержка загрузки гостей ArceOS на LoongArch64 в AxVisor</text:a></text:span><text:span text:style-name="T6"><text:s/>— гипервизор type-1. Также исправлены различные ошибки с битами флагов таблиц страниц, обработкой MMIO и конфигурацией CI, а также обновлены QEMU-LVZ для корректного поведения гостя.</text:span></text:p>
                  </text:list-item>
                </text:list>
              </text:list-item>
              <text:list-item>
                <text:p text:style-name="P9"><text:span text:style-name="T8">JounQin</text:span><text:span text:style-name="T5">:</text:span></text:p>
                <text:list>
                  <text:list-item>
                    <text:p text:style-name="P9"><text:span text:style-name="T9"><text:a xlink:href="https://github.com/unrs/unrs-resolver/pull/209" xlink:type="simple">Добавлена логика условной компиляции</text:a></text:span><text:span text:style-name="T6"><text:s/>для исключения флага </text:span><text:span text:style-name="T10">STATX_DONT_SYNC</text:span><text:span text:style-name="T6"> на платформе </text:span><text:span text:style-name="T10">loongarch64-musl</text:span><text:span text:style-name="T6">, что позволило устранить ошибку сборки, вызванную тем, что этот флаг не экспортируется rustix на loongarch64-musl.</text:span></text:p>
                  </text:list-item>
                </text:list>
              </text:list-item>
              <text:list-item>
                <text:p text:style-name="P9"><text:span text:style-name="T8">anematode</text:span><text:span text:style-name="T5">:</text:span></text:p>
                <text:list>
                  <text:list-item>
                    <text:p text:style-name="P9"><text:span text:style-name="T9"><text:a xlink:href="https://github.com/official-stockfish/Stockfish/pull/6832" xlink:type="simple">Добавлены оптимизации для архитектуры LoongArch в шахматный движок Stockfish</text:a></text:span><text:span text:style-name="T6">. Используются встроенные блоки ассемблера для реализации операций с обращением битов, необходимых в алгоритме hyperbola quintessence, что ускоряет вычисления на битовых досках (bitboard calculations). Также удалены ненужные преобразования типов в коде аккумулятора NNU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2;g3e4ea6c7ccb_0_3:notes" draw:style-name="gr3" draw:layer="layout" svg:width="16.932cm" svg:height="9.524cm" svg:x="1.059cm" svg:y="1.905cm" draw:page-number="19" presentation:class="page"/>
          <draw:frame draw:name="Google Shape;163;g3e4ea6c7ccb_0_3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чие обновления (вклад участников)" draw:style-name="dp21" draw:master-page-name="TITLE_5f_AND_5f_BODY" presentation:presentation-page-layout-name="AL2T1">
        <draw:frame draw:name="Google Shape;171;p3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Прочие обновления (вклад участников)</text:span></text:p>
          </draw:text-box>
        </draw:frame>
        <draw:frame draw:name="Google Shape;172;p32" presentation:style-name="pr5" draw:text-style-name="P10" draw:layer="layout" svg:width="25.098cm" svg:height="10.291cm" svg:x="0cm" svg:y="3.171cm" presentation:class="outline" presentation:user-transformed="true">
          <draw:text-box>
            <text:list text:style-name="L5">
              <text:list-item>
                <text:p text:style-name="P9"><text:span text:style-name="T8">arrowd</text:span><text:span text:style-name="T5">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<text:a xlink:href="https://github.com/xerial/snappy-java/pull/725" xlink:type="simple">Добавлена поддержка сборки для LoongArch64 в проект snappy.java</text:a></text:span><text:span text:style-name="T6"><text:s/>— библиотеку сжатия Snappy, написанную на Java. Для кросскомпиляции библиотеки используется инструментарий dockcross, что позволяет системе сборки создавать нативные библиотеки для LoongArch64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6">Однако разработчики после ревью с LLM обнаружили в вспомогательном скрипте устаревшие комментарии и повторные декларации функций, что требует дальнейших доработок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yetist</text:span><text:span text:style-name="T5">:</text:span></text:p>
                <text:list>
                  <text:list-item>
                    <text:p text:style-name="P9"><text:span text:style-name="T9"><text:a xlink:href="https://github.com/ipxe/ipxe/pull/1712" xlink:type="simple">Отключена генерация SIMD-инструкций LSX/LASX для сборок проекта iPXE</text:a></text:span><text:span text:style-name="T6"><text:s/>(реализации PXE-загрузки по сети) под архитектуру LoongArch, а процедуры вычисления контрольной суммы TCP/IP переписаны с использованием рукописного ассемблера, что повысило скорость на 3900%.</text:span></text:p>
                    <text:list>
                      <text:list-item>
                        <text:p text:style-name="P9"><text:span text:style-name="T6">Кроме того, после проверки апстримовских мейнтейнеров сборки Secure Boot теперь также поддерживаются на LoongArch64.</text:span></text:p>
                      </text:list-item>
                      <text:list-item>
                        <text:p text:style-name="P9"><text:span text:style-name="T6">Апстримовские мейнтейнеры надеются, что Loongson в будущем прояснит свой подход к поддержке UEFI Secure Boo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8;g3e4a131875a_0_338:notes" draw:style-name="gr3" draw:layer="layout" svg:width="16.932cm" svg:height="9.524cm" svg:x="1.059cm" svg:y="1.905cm" draw:page-number="20" presentation:class="page"/>
          <draw:frame draw:name="Google Shape;169;g3e4a131875a_0_338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чие обновления (вклад участников)" draw:style-name="dp22" draw:master-page-name="TITLE_5f_AND_5f_BODY" presentation:presentation-page-layout-name="AL2T1">
        <draw:frame draw:name="Google Shape;177;p3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Прочие обновления (вклад участников)</text:span></text:p>
          </draw:text-box>
        </draw:frame>
        <draw:frame draw:name="Google Shape;178;p33" presentation:style-name="pr5" draw:text-style-name="P10" draw:layer="layout" svg:width="23.667cm" svg:height="10.29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8">zhaixiaojuan</text:span><text:span text:style-name="T5">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<text:a xlink:href="https://github.com/bazel-contrib/rules_go/pull/4610" xlink:type="simple">Добавлена поддержка LoongArch в набор правил Go (rules_go) для Bazel</text:a></text:span><text:span text:style-name="T6"><text:s/>— системы сборки, используемой обычно в проектах, связанных с Android.</text:span></text:p>
                  </text:list-item>
                </text:list>
              </text:list-item>
              <text:list-item>
                <text:p text:style-name="P9"><text:span text:style-name="T8">leno23</text:span><text:span text:style-name="T5">:</text:span></text:p>
                <text:list>
                  <text:list-item>
                    <text:p text:style-name="P9"><text:span text:style-name="T9"><text:a xlink:href="https://github.com/simdjson/simdjson/pull/2727" xlink:type="simple">Оптимизирована</text:a></text:span><text:span text:style-name="T6"><text:s/>функция </text:span><text:span text:style-name="T10">fast_needs_escaping</text:span><text:span text:style-name="T6"> с использованием SIMD-инструкций LSX для проекта simdjson, что ускорило обнаружение управляющих символов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4;g3e4a131875a_0_388:notes" draw:style-name="gr3" draw:layer="layout" svg:width="16.932cm" svg:height="9.524cm" svg:x="1.059cm" svg:y="1.905cm" draw:page-number="21" presentation:class="page"/>
          <draw:frame draw:name="Google Shape;175;g3e4a131875a_0_388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бновления дистрибутивов/ОС" draw:style-name="dp23" draw:master-page-name="SECTION_5f_HEADER">
        <draw:frame draw:name="Google Shape;183;p34" presentation:style-name="pr8" draw:text-style-name="P11" draw:layer="layout" svg:width="19.778cm" svg:height="6.527cm" svg:x="4.699cm" svg:y="2.351cm" presentation:class="title" presentation:user-transformed="true">
          <draw:text-box>
            <text:p text:style-name="P1"><text:span text:style-name="T28">Обновления дистрибутивов/ОС</text:span></text:p>
          </draw:text-box>
        </draw:frame>
        <presentation:notes draw:style-name="dp2">
          <draw:page-thumbnail draw:name="Google Shape;180;g3dfcc34c27b_0_15:notes" draw:style-name="gr3" draw:layer="layout" svg:width="16.932cm" svg:height="9.524cm" svg:x="1.059cm" svg:y="1.905cm" draw:page-number="22" presentation:class="page"/>
          <draw:frame draw:name="Google Shape;181;g3dfcc34c27b_0_15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OSC ОС" draw:style-name="dp24" draw:master-page-name="TITLE_5f_AND_5f_BODY" presentation:presentation-page-layout-name="AL2T1">
        <draw:frame draw:name="Google Shape;188;p35" presentation:style-name="pr4" draw:text-style-name="P8" draw:layer="layout" svg:width="23.667cm" svg:height="1.59cm" svg:x="0.169cm" svg:y="0cm" presentation:class="title" presentation:user-transformed="true">
          <draw:text-box>
            <text:p text:style-name="P1"><text:span text:style-name="T4">AOSC ОС</text:span></text:p>
          </draw:text-box>
        </draw:frame>
        <draw:frame draw:name="Google Shape;189;p35" presentation:style-name="pr5" draw:text-style-name="P10" draw:layer="layout" svg:width="19.219cm" svg:height="12.74cm" svg:x="0cm" svg:y="1.546cm" presentation:class="outline" presentation:user-transformed="true">
          <draw:text-box>
            <text:list text:style-name="L5">
              <text:list-item>
                <text:p text:style-name="P9"><text:span text:style-name="T5">Core 13.2.0 стал доступен в стабильном репозитории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Бэкпортированы улучшения защиты стека из GCC 16.2 </text:span><text:span text:style-name="T6"><text:line-break/></text:span><text:span text:style-name="T6">в GCC 15.2 и патчи выравнивания THP-aware сегментов загрузки из glibc 2.44 в glibc 2.42.</text:span></text:p>
                  </text:list-item>
                  <text:list-item>
                    <text:p text:style-name="P9"><text:span text:style-name="T6">Реальное тестирование показало снижение времени CPU на 2% при сборке больших проектов с помощью LLVM.</text:span></text:p>
                  </text:list-item>
                  <text:list-item>
                    <text:p text:style-name="P9"><text:span text:style-name="T6">Бэкпортированы 3 исправления безопасности.</text:span></text:p>
                  </text:list-item>
                </text:list>
              </text:list-item>
              <text:list-item>
                <text:p text:style-name="P9"><text:span text:style-name="T5">Linux 7.0.9 стал доступен для тестирования:</text:span></text:p>
                <text:list>
                  <text:list-item>
                    <text:p text:style-name="P9"><text:span text:style-name="T6">Бэкпортирован рефакторинг кода сохранения/восстановления FPU-контекста в режиме ядра для amdgpu из Linux 7.1. Новейшие процессоры AMD Radeon 9070 XT сейчас должны работать.</text:span></text:p>
                  </text:list-item>
                  <text:list-item>
                    <text:p text:style-name="P9"><text:span text:style-name="T6">Отключено объединение записи (WC), которое вызывало проблемы (артефакты, зависания и т.д.) с графическими процессорами Intel и AMD RX 7600.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6">Writecombine никогда не работал корректно, поэтому мы оставим его отключённым… до следующего поколения?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90;p35" draw:style-name="gr1" draw:text-style-name="P4" draw:layer="layout" svg:width="5.929cm" svg:height="6.821cm" svg:x="18.924cm" svg:y="3.733cm">
          <draw:image xlink:href="Pictures/100002010000058E00000664C1559BD371BC19A0.png" xlink:type="simple" xlink:show="embed" xlink:actuate="onLoad">
            <text:p/>
          </draw:image>
        </draw:frame>
        <presentation:notes draw:style-name="dp2">
          <draw:page-thumbnail draw:name="Google Shape;185;g3e4ea6c7ccb_0_113:notes" draw:style-name="gr3" draw:layer="layout" svg:width="16.932cm" svg:height="9.524cm" svg:x="1.059cm" svg:y="1.905cm" draw:page-number="23" presentation:class="page"/>
          <draw:frame draw:name="Google Shape;186;g3e4ea6c7ccb_0_113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OSC ОС" draw:style-name="dp25" draw:master-page-name="TITLE_5f_AND_5f_BODY" presentation:presentation-page-layout-name="AL2T1">
        <draw:frame draw:name="Google Shape;195;p36" presentation:style-name="pr4" draw:text-style-name="P8" draw:layer="layout" svg:width="23.667cm" svg:height="1.59cm" svg:x="0.324cm" svg:y="0.484cm" presentation:class="title" presentation:user-transformed="true">
          <draw:text-box>
            <text:p text:style-name="P1"><text:span text:style-name="T4">AOSC ОС</text:span></text:p>
          </draw:text-box>
        </draw:frame>
        <draw:frame draw:name="Google Shape;196;p36" presentation:style-name="pr5" draw:text-style-name="P10" draw:layer="layout" svg:width="18.586cm" svg:height="11.442cm" svg:x="0.176cm" svg:y="2.075cm" presentation:class="outline" presentation:user-transformed="true">
          <draw:text-box>
            <text:list text:style-name="L5">
              <text:list-item>
                <text:p text:style-name="P9"><text:span text:style-name="T5">Драйвер LoongGPU обновлён с версии 1.0.2-oky11.1~0.10 до 1.0.2-ud25.1-rc1.10.1.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Дата в исходниках модуля DKMS сменилась с 1/27/2026 на 3/13/2026. Возможно, были проведены некоторые исправления, что пока не совсем ясно.</text:span></text:p>
                  </text:list-item>
                  <text:list-item>
                    <text:p text:style-name="P9"><text:span text:style-name="T6">MIPI-дисплеи теперь работают на Orange Pi Nova.</text:span></text:p>
                  </text:list-item>
                  <text:list-item>
                    <text:p text:style-name="P9"><text:span text:style-name="T6">Страницы ядра размером 4KiB, по-видимому, всё ещё сломаны.</text:span></text:p>
                  </text:list-item>
                </text:list>
              </text:list-item>
              <text:list-item>
                <text:p text:style-name="P9"><text:span text:style-name="T5">GHC вместе с pandoc сейчас доступны </text:span></text:p>
                <text:list>
                  <text:list-item>
                    <text:p text:style-name="P9"><text:span text:style-name="T6">siyuan-note — программное обеспечение для организации заметок и работы с базами знаний — также теперь доступно на LoongArch.</text:span></text:p>
                  </text:list-item>
                </text:list>
              </text:list-item>
              <text:list-item>
                <text:p text:style-name="P9"><text:span text:style-name="T5">Zotero 9.x, основанный на Firefox 140 ESR, </text:span><text:span text:style-name="T5"><text:line-break/></text:span><text:span text:style-name="T5">сейчас доступен.</text:span></text:p>
                <text:list>
                  <text:list-item>
                    <text:p text:style-name="P9"><text:span text:style-name="T6">Студенты, исследователи и все, кто любит архивировать данные, — можете ликовать!</text:span></text:p>
                  </text:list-item>
                </text:list>
              </text:list-item>
            </text:list>
          </draw:text-box>
        </draw:frame>
        <draw:frame draw:name="Google Shape;197;p36" draw:style-name="gr1" draw:text-style-name="P4" draw:layer="layout" svg:width="5.929cm" svg:height="6.821cm" svg:x="19.079cm" svg:y="3.409cm">
          <draw:image xlink:href="Pictures/100002010000058E00000664C1559BD371BC19A0.png" xlink:type="simple" xlink:show="embed" xlink:actuate="onLoad">
            <text:p/>
          </draw:image>
        </draw:frame>
        <presentation:notes draw:style-name="dp2">
          <draw:page-thumbnail draw:name="Google Shape;192;g3e4ea6c7ccb_0_163:notes" draw:style-name="gr3" draw:layer="layout" svg:width="16.932cm" svg:height="9.524cm" svg:x="1.059cm" svg:y="1.905cm" draw:page-number="24" presentation:class="page"/>
          <draw:frame draw:name="Google Shape;193;g3e4ea6c7ccb_0_163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OSC ОС" draw:style-name="dp26" draw:master-page-name="TITLE_5f_AND_5f_BODY" presentation:presentation-page-layout-name="AL2T1">
        <draw:frame draw:name="Google Shape;202;p3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AOSC ОС</text:span></text:p>
          </draw:text-box>
        </draw:frame>
        <draw:frame draw:name="Google Shape;203;p37" presentation:style-name="pr5" draw:text-style-name="P10" draw:layer="layout" svg:width="16.822cm" svg:height="10.291cm" svg:x="0.47cm" svg:y="3.201cm" presentation:class="outline" presentation:user-transformed="true">
          <draw:text-box>
            <text:list text:style-name="L5">
              <text:list-item>
                <text:p text:style-name="P9"><text:span text:style-name="T5">Выпустили 25 обновлений безопасности за последние две недели, исправив </text:span><text:span text:style-name="T5"><text:line-break/></text:span><text:span text:style-name="T29">5 критических и 31 уязвимость высокого уровня риска</text:span><text:span text:style-name="T5">, включая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Уязвимости LPE, нацеленные на ядро Linux, получившие кодовые названия “DirtyFrag” и “PinTheft”.</text:span></text:p>
                  </text:list-item>
                  <text:list-item>
                    <text:p text:style-name="P9"><text:span text:style-name="T6">7 уязвимостей высокого риска, исправленных в PostgreSQL 18.4, 17.10, 16.14, 15.18 и 14.23.</text:span></text:p>
                  </text:list-item>
                </text:list>
              </text:list-item>
            </text:list>
          </draw:text-box>
        </draw:frame>
        <draw:frame draw:name="Google Shape;204;p37" draw:style-name="gr1" draw:text-style-name="P4" draw:layer="layout" svg:width="5.929cm" svg:height="6.821cm" svg:x="18.623cm" svg:y="3.201cm">
          <draw:image xlink:href="Pictures/100002010000058E00000664C1559BD371BC19A0.png" xlink:type="simple" xlink:show="embed" xlink:actuate="onLoad">
            <text:p/>
          </draw:image>
        </draw:frame>
        <presentation:notes draw:style-name="dp2">
          <draw:page-thumbnail draw:name="Google Shape;199;g3e4ea6c7ccb_0_213:notes" draw:style-name="gr3" draw:layer="layout" svg:width="16.932cm" svg:height="9.524cm" svg:x="1.059cm" svg:y="1.905cm" draw:page-number="25" presentation:class="page"/>
          <draw:frame draw:name="Google Shape;200;g3e4ea6c7ccb_0_213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Wrt" draw:style-name="dp27" draw:master-page-name="TITLE_5f_AND_5f_BODY" presentation:presentation-page-layout-name="AL2T1">
        <draw:frame draw:name="Google Shape;209;p3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OpenWrt</text:span></text:p>
          </draw:text-box>
        </draw:frame>
        <draw:frame draw:name="Google Shape;210;p38" presentation:style-name="pr5" draw:text-style-name="P10" draw:layer="layout" svg:width="23.667cm" svg:height="10.29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Xinmu </text:span><text:span text:style-name="T26"><text:a xlink:href="https://github.com/openwrt/openwrt/pull/23366" xlink:type="simple">отправил</text:a></text:span><text:span text:style-name="T5"><text:s/>3 патча для ядра в основной репозиторий, добавив поддержку встроенного Ethernet для SoC 2K3000/3B6000M </text:span><text:span text:style-name="T5"><text:line-break/></text:span><text:span text:style-name="T5">для их ядра 6.12.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PR принят и будет включён в следующий релиз OpenW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6;g3e4ea6c7ccb_0_263:notes" draw:style-name="gr3" draw:layer="layout" svg:width="16.932cm" svg:height="9.524cm" svg:x="1.059cm" svg:y="1.905cm" draw:page-number="26" presentation:class="page"/>
          <draw:frame draw:name="Google Shape;207;g3e4ea6c7ccb_0_26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mox VE" draw:style-name="dp28" draw:master-page-name="TITLE_5f_AND_5f_BODY" presentation:presentation-page-layout-name="AL2T1">
        <draw:frame draw:name="Google Shape;215;p39" presentation:style-name="pr4" draw:text-style-name="P8" draw:layer="layout" svg:width="23.667cm" svg:height="1.59cm" svg:x="0.376cm" svg:y="0.485cm" presentation:class="title" presentation:user-transformed="true">
          <draw:text-box>
            <text:p text:style-name="P1"><text:span text:style-name="T4">Proxmox VE</text:span></text:p>
          </draw:text-box>
        </draw:frame>
        <draw:frame draw:name="Google Shape;216;p39" presentation:style-name="pr5" draw:text-style-name="P10" draw:layer="layout" svg:width="17.304cm" svg:height="11.572cm" svg:x="0.209cm" svg:y="1.921cm" presentation:class="outline" presentation:user-transformed="true">
          <draw:text-box>
            <text:list text:style-name="L10">
              <text:list-item>
                <text:p text:style-name="P9"><text:span text:style-name="T5">Kaiyang Wu и Mingcong Bai начали работу над портом Proxmox VE, ориентированным на взаимодействие с апстримом. Патчи отслеживают последние апстримовские изменения, размещённые в организации GitHub </text:span><text:span text:style-name="T26"><text:a xlink:href="https://github.com/pve-loong64-port" xlink:type="simple">pve-loong64-port</text:a></text:span><text:span text:style-name="T5">.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6">Порт основан на </text:span><text:span text:style-name="T9"><text:a xlink:href="https://loong13.debian.net/" xlink:type="simple">неофициальном дистрибутиве «loong13»</text:a></text:span><text:span text:style-name="T6"><text:s/>(стабильный Debian 13 для LoongArch) от Miao Wang.</text:span></text:p>
                  </text:list-item>
                  <text:list-item>
                    <text:p text:style-name="P9"><text:span text:style-name="T9"><text:a xlink:href="https://lore.proxmox.com/pve-devel/08747f9c-52e1-4275-822d-dacbe53a95f0@gmail.com/" xlink:type="simple">Мы связались с разработчиками Proxmox VE</text:a></text:span><text:span text:style-name="T6">. Апстрим положительно оценил наши усилия, но отказался рассматривать LoongArch как официальный порт из-за отсутствия (официальных) стабильных релизов Debian и низкой доступности оборудования </text:span><text:span text:style-name="T6"><text:line-break/></text:span><text:span text:style-name="T6">в Европе.</text:span></text:p>
                  </text:list-item>
                  <text:list-item>
                    <text:p text:style-name="P9"><text:span text:style-name="T6">Пока мы продолжим работу над портом, стремясь к качеству на уровне апстрима, и одновременно будем отправлять патчи, которые улучшат поддержку архитектур, отличных от x86, </text:span><text:span text:style-name="T9"><text:a xlink:href="https://lore.proxmox.com/pve-devel/3af17bf6-decc-4b29-9872-25bb3abcb88b@proxmox.com/" xlink:type="simple">как и предложил апстримовский мейнтейнер Thomas Lamprecht</text:a></text:span><text:span text:style-name="T6">.</text:span></text:p>
                  </text:list-item>
                  <text:list-item>
                    <text:p text:style-name="P9"><text:span text:style-name="T6">ISO должен быть доступен в ближайшее время, также будет создан сайт для загрузок.</text:span></text:p>
                  </text:list-item>
                </text:list>
              </text:list-item>
            </text:list>
          </draw:text-box>
        </draw:frame>
        <draw:frame draw:name="Google Shape;217;p39" draw:style-name="gr4" draw:text-style-name="P4" draw:layer="layout" svg:width="7.038cm" svg:height="4.746cm" svg:x="17.514cm" svg:y="3.201cm">
          <draw:image xlink:href="Pictures/100002010000019000000190F14FCC3D055622C0.png" xlink:type="simple" xlink:show="embed" xlink:actuate="onLoad">
            <text:p/>
          </draw:image>
        </draw:frame>
        <presentation:notes draw:style-name="dp2">
          <draw:page-thumbnail draw:name="Google Shape;212;g3e56a158dff_1_289:notes" draw:style-name="gr3" draw:layer="layout" svg:width="16.932cm" svg:height="9.524cm" svg:x="1.059cm" svg:y="1.905cm" draw:page-number="27" presentation:class="page"/>
          <draw:frame draw:name="Google Shape;213;g3e56a158dff_1_289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eAlt" draw:style-name="dp29" draw:master-page-name="TITLE_5f_AND_5f_BODY" presentation:presentation-page-layout-name="AL2T1">
        <draw:frame draw:name="Google Shape;222;p40" presentation:style-name="pr4" draw:text-style-name="P8" draw:layer="layout" svg:width="23.667cm" svg:height="1.59cm" svg:x="0.866cm" svg:y="0.722cm" presentation:class="title" presentation:user-transformed="true">
          <draw:text-box>
            <text:p text:style-name="P1"><text:span text:style-name="T4">BaseAlt</text:span></text:p>
          </draw:text-box>
        </draw:frame>
        <draw:frame draw:name="Google Shape;223;p40" presentation:style-name="pr5" draw:text-style-name="P10" draw:layer="layout" svg:width="16.647cm" svg:height="10.29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Поддержка производителей оборудования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Тесное взаимодействие с Трамплин Электроникс </text:span></text:p>
                  </text:list-item>
                </text:list>
              </text:list-item>
              <text:list-item>
                <text:p text:style-name="P9"><text:span text:style-name="T5">Обновление пакетной базы</text:span></text:p>
                <text:list>
                  <text:list-item>
                    <text:p text:style-name="P9"><text:span text:style-name="T6">Несколько изменений, ничего крупного. Статус можно посмотреть </text:span><text:span text:style-name="T9"><text:a xlink:href="https://packages.altlinux.org/ru/sisyphus_loongarch64/packages/" xlink:type="simple">здесь</text:a></text:span></text:p>
                  </text:list-item>
                </text:list>
              </text:list-item>
              <text:list-item>
                <text:p text:style-name="P9"><text:span text:style-name="T5">Настройка инфраструктуры сборки</text:span></text:p>
                <text:list>
                  <text:list-item>
                    <text:p text:style-name="P9"><text:span text:style-name="T6">Наконец-то перенесли регулярные ночные сборки на серверы на базе Irtysh</text:span></text:p>
                  </text:list-item>
                </text:list>
              </text:list-item>
              <text:list-item>
                <text:p text:style-name="P9"><text:span text:style-name="T5">Стабильные продукты</text:span></text:p>
                <text:list>
                  <text:list-item>
                    <text:p text:style-name="P9"><text:span text:style-name="T6">Идёт подготовка к выпуску сервера Alt и рабочей станции Alt для loongarch. Продукты прошли этап разработки и готовы к внутреннему функциональному тестированию</text:span></text:p>
                  </text:list-item>
                </text:list>
              </text:list-item>
            </text:list>
          </draw:text-box>
        </draw:frame>
        <draw:frame draw:name="Google Shape;224;p40" draw:style-name="gr1" draw:text-style-name="P4" draw:layer="layout" svg:width="6.084cm" svg:height="5.793cm" svg:x="18.91cm" svg:y="7.144cm">
          <draw:image xlink:href="Pictures/10000000000000E6000000DBA2FA6FDB945CE5C5.png" xlink:type="simple" xlink:show="embed" xlink:actuate="onLoad">
            <text:p/>
          </draw:image>
        </draw:frame>
        <presentation:notes draw:style-name="dp2">
          <draw:page-thumbnail draw:name="Google Shape;219;g3e56a158dff_1_340:notes" draw:style-name="gr3" draw:layer="layout" svg:width="16.932cm" svg:height="9.524cm" svg:x="1.059cm" svg:y="1.905cm" draw:page-number="28" presentation:class="page"/>
          <draw:frame draw:name="Google Shape;220;g3e56a158dff_1_340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овости и мероприятия сообщества " draw:style-name="dp30" draw:master-page-name="SECTION_5f_HEADER">
        <draw:frame draw:name="Google Shape;229;p41" presentation:style-name="pr8" draw:text-style-name="P11" draw:layer="layout" svg:width="15.932cm" svg:height="5.151cm" svg:x="4.855cm" svg:y="3.914cm" presentation:class="title" presentation:user-transformed="true">
          <draw:text-box>
            <text:p text:style-name="P1"><text:span text:style-name="T7">Новости и мероприятия сообщества</text:span><text:span text:style-name="T30"> </text:span></text:p>
          </draw:text-box>
        </draw:frame>
        <presentation:notes draw:style-name="dp2">
          <draw:page-thumbnail draw:name="Google Shape;226;g3dfcc34c27b_0_19:notes" draw:style-name="gr3" draw:layer="layout" svg:width="16.932cm" svg:height="9.524cm" svg:x="1.059cm" svg:y="1.905cm" draw:page-number="29" presentation:class="page"/>
          <draw:frame draw:name="Google Shape;227;g3dfcc34c27b_0_19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тоги сессии #1 " draw:style-name="dp31" draw:master-page-name="TITLE_5f_AND_5f_BODY" presentation:presentation-page-layout-name="AL2T1">
        <draw:frame draw:name="Google Shape;234;p4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Итоги сессии #1 </text:span></text:p>
          </draw:text-box>
        </draw:frame>
        <draw:frame draw:name="Google Shape;235;p42" presentation:style-name="pr5" draw:text-style-name="P10" draw:layer="layout" svg:width="23.667cm" svg:height="10.29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Спасибо всем за поддержку нашей первой сессии </text:span><text:span text:style-name="T5"><text:line-break/></text:span><text:span text:style-name="T5">International LoongArch Biweekly!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0">Вау!</text:span><text:span text:style-name="T6"> Более 50 человек посетили сессию!</text:span></text:p>
                  </text:list-item>
                  <text:list-item>
                    <text:p text:style-name="P9"><text:span text:style-name="T12">Mia</text:span><text:span text:style-name="T6">, инженер по прошивкам UEFI из Трамплин Электроникс, поделилась некоторыми методами отладки и устранения неполадок в UEFI.</text:span></text:p>
                  </text:list-item>
                  <text:list-item>
                    <text:p text:style-name="P9"><text:span text:style-name="T12">Многие коллеги </text:span><text:span text:style-name="T6">из Трамплин Электроникс оказали поддержку во время презентации и в переводе слайдов. Они также смонтировали запись с русским переводом.</text:span></text:p>
                  </text:list-item>
                </text:list>
              </text:list-item>
              <text:list-item>
                <text:p text:style-name="P9"><text:span text:style-name="T5">Пожалуйста, подпишитесь на наш YouTube канал!</text:span></text:p>
                <text:list>
                  <text:list-item>
                    <text:p text:style-name="P9"><text:span text:style-name="T6">https://www.youtube.com/@loongfans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231;g3e4ea6c7ccb_0_313:notes" draw:style-name="gr3" draw:layer="layout" svg:width="16.932cm" svg:height="9.524cm" svg:x="1.059cm" svg:y="1.905cm" draw:page-number="30" presentation:class="page"/>
          <draw:frame draw:name="Google Shape;232;g3e4ea6c7ccb_0_313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едстоящий доклад" draw:style-name="dp32" draw:master-page-name="TITLE_5f_AND_5f_BODY" presentation:presentation-page-layout-name="AL2T1">
        <draw:frame draw:name="Google Shape;240;p4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Предстоящий доклад</text:span></text:p>
          </draw:text-box>
        </draw:frame>
        <draw:frame draw:name="Google Shape;241;p43" presentation:style-name="pr5" draw:text-style-name="P10" draw:layer="layout" svg:width="23.667cm" svg:height="10.29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26"><text:a xlink:href="https://github.com/ptitSeb" xlink:type="simple">ptitSeb</text:a></text:span><text:span text:style-name="T5">, основатель и мейнтейнер </text:span><text:span text:style-name="T26"><text:a xlink:href="https://github.com/ptitSeb/box64" xlink:type="simple">Box64</text:a></text:span><text:span text:style-name="T5">, выступит с презентацией своего проекта на следующей встрече!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237;g3e56a158dff_1_396:notes" draw:style-name="gr3" draw:layer="layout" svg:width="16.932cm" svg:height="9.524cm" svg:x="1.059cm" svg:y="1.905cm" draw:page-number="31" presentation:class="page"/>
          <draw:frame draw:name="Google Shape;238;g3e56a158dff_1_396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&amp;A" draw:style-name="dp33" draw:master-page-name="SECTION_5f_HEADER">
        <draw:frame draw:name="Google Shape;246;p44" presentation:style-name="pr8" draw:text-style-name="P11" draw:layer="layout" svg:width="15.932cm" svg:height="5.151cm" svg:x="4.734cm" svg:y="3.754cm" presentation:class="title" presentation:user-transformed="true">
          <draw:text-box>
            <text:p text:style-name="P1"><text:span text:style-name="T30">Q&amp;A</text:span></text:p>
          </draw:text-box>
        </draw:frame>
        <presentation:notes draw:style-name="dp2">
          <draw:page-thumbnail draw:name="Google Shape;243;g3dfcc34c27b_0_37:notes" draw:style-name="gr3" draw:layer="layout" svg:width="16.932cm" svg:height="9.524cm" svg:x="1.059cm" svg:y="1.905cm" draw:page-number="32" presentation:class="page"/>
          <draw:frame draw:name="Google Shape;244;g3dfcc34c27b_0_37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едующая встреча&#10;11 июня, 2026, 16:00 (Москва)" draw:style-name="dp34" draw:master-page-name="SECTION_5f_HEADER">
        <draw:frame draw:name="Google Shape;251;p45" presentation:style-name="pr8" draw:text-style-name="P11" draw:layer="layout" svg:width="18.281cm" svg:height="6.339cm" svg:x="4.953cm" svg:y="2.34cm" presentation:class="title" presentation:user-transformed="true">
          <draw:text-box>
            <text:p text:style-name="P1"><text:span text:style-name="T7">Следующая встреча</text:span><text:span text:style-name="T7"><text:line-break/></text:span><text:span text:style-name="T31">11 июня, 2026, 16:00 (Москва)</text:span></text:p>
          </draw:text-box>
        </draw:frame>
        <presentation:notes draw:style-name="dp2">
          <draw:page-thumbnail draw:name="Google Shape;248;g3e1779161b9_19_9:notes" draw:style-name="gr3" draw:layer="layout" svg:width="16.932cm" svg:height="9.524cm" svg:x="1.059cm" svg:y="1.905cm" draw:page-number="33" presentation:class="page"/>
          <draw:frame draw:name="Google Shape;249;g3e1779161b9_19_9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5" draw:master-page-name="BLANK">
        <draw:g draw:name="Google Shape;256;p46">
          <draw:frame draw:name="Google Shape;257;p46" draw:style-name="gr1" draw:text-style-name="P4" draw:layer="layout" svg:width="6.081cm" svg:height="6.081cm" svg:x="1.528cm" svg:y="1.084cm">
            <draw:image xlink:href="Pictures/1000020100000258000002588DEC3A807A82A2ED.png" xlink:type="simple" xlink:show="embed" xlink:actuate="onLoad">
              <text:p/>
            </draw:image>
          </draw:frame>
          <draw:frame draw:name="Google Shape;258;p46" draw:style-name="gr1" draw:text-style-name="P4" draw:layer="layout" svg:width="6.081cm" svg:height="6.036cm" svg:x="1.528cm" svg:y="7.166cm">
            <draw:image xlink:href="Pictures/1000020100000800000007F1F4ED2107A96DD24F.png" xlink:type="simple" xlink:show="embed" xlink:actuate="onLoad">
              <text:p/>
            </draw:image>
          </draw:frame>
          <draw:custom-shape draw:name="Google Shape;259;p46" draw:style-name="gr5" draw:text-style-name="P6" draw:layer="layout" svg:width="4.784cm" svg:height="1.143cm" svg:x="2.177cm" svg:y="6.458cm">
            <text:p text:style-name="P5"><text:span text:style-name="T32">Discord 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53;g3dfcc34c27b_0_5:notes" draw:style-name="gr3" draw:layer="layout" svg:width="16.932cm" svg:height="9.524cm" svg:x="1.059cm" svg:y="1.905cm" draw:page-number="34" presentation:class="page"/>
          <draw:frame draw:name="Google Shape;254;g3dfcc34c27b_0_5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exend" svg:font-family="Lexen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78000000438FB9888FCEB2E67BA.png" xlink:type="simple" xlink:show="embed" xlink:actuate="onLoad"/>
    <draw:fill-image draw:name="msFillBitmap_20_10" draw:display-name="msFillBitmap 10" xlink:href="Pictures/1000020100000780000004380007A137417BB6AD.png" xlink:type="simple" xlink:show="embed" xlink:actuate="onLoad"/>
    <draw:fill-image draw:name="msFillBitmap_20_11" draw:display-name="msFillBitmap 11" xlink:href="Pictures/1000020100000780000004380007A137417BB6AD.png" xlink:type="simple" xlink:show="embed" xlink:actuate="onLoad"/>
    <draw:fill-image draw:name="msFillBitmap_20_12" draw:display-name="msFillBitmap 12" xlink:href="Pictures/1000020100000780000004380007A137417BB6AD.png" xlink:type="simple" xlink:show="embed" xlink:actuate="onLoad"/>
    <draw:fill-image draw:name="msFillBitmap_20_13" draw:display-name="msFillBitmap 13" xlink:href="Pictures/1000020100000780000004380007A137417BB6AD.png" xlink:type="simple" xlink:show="embed" xlink:actuate="onLoad"/>
    <draw:fill-image draw:name="msFillBitmap_20_14" draw:display-name="msFillBitmap 14" xlink:href="Pictures/1000020100000780000004380007A137417BB6AD.png" xlink:type="simple" xlink:show="embed" xlink:actuate="onLoad"/>
    <draw:fill-image draw:name="msFillBitmap_20_15" draw:display-name="msFillBitmap 15" xlink:href="Pictures/1000020100000780000004380007A137417BB6AD.png" xlink:type="simple" xlink:show="embed" xlink:actuate="onLoad"/>
    <draw:fill-image draw:name="msFillBitmap_20_16" draw:display-name="msFillBitmap 16" xlink:href="Pictures/1000020100000780000004380007A137417BB6AD.png" xlink:type="simple" xlink:show="embed" xlink:actuate="onLoad"/>
    <draw:fill-image draw:name="msFillBitmap_20_17" draw:display-name="msFillBitmap 17" xlink:href="Pictures/1000020100000780000004380007A137417BB6AD.png" xlink:type="simple" xlink:show="embed" xlink:actuate="onLoad"/>
    <draw:fill-image draw:name="msFillBitmap_20_18" draw:display-name="msFillBitmap 18" xlink:href="Pictures/1000020100000780000004380007A137417BB6AD.png" xlink:type="simple" xlink:show="embed" xlink:actuate="onLoad"/>
    <draw:fill-image draw:name="msFillBitmap_20_19" draw:display-name="msFillBitmap 19" xlink:href="Pictures/1000020100000780000004380007A137417BB6AD.png" xlink:type="simple" xlink:show="embed" xlink:actuate="onLoad"/>
    <draw:fill-image draw:name="msFillBitmap_20_2" draw:display-name="msFillBitmap 2" xlink:href="Pictures/1000020100000780000004380007A137417BB6AD.png" xlink:type="simple" xlink:show="embed" xlink:actuate="onLoad"/>
    <draw:fill-image draw:name="msFillBitmap_20_20" draw:display-name="msFillBitmap 20" xlink:href="Pictures/1000020100000780000004380007A137417BB6AD.png" xlink:type="simple" xlink:show="embed" xlink:actuate="onLoad"/>
    <draw:fill-image draw:name="msFillBitmap_20_21" draw:display-name="msFillBitmap 21" xlink:href="Pictures/1000020100000780000004380007A137417BB6AD.png" xlink:type="simple" xlink:show="embed" xlink:actuate="onLoad"/>
    <draw:fill-image draw:name="msFillBitmap_20_22" draw:display-name="msFillBitmap 22" xlink:href="Pictures/100002010000078000000438F65FBB7085B19647.png" xlink:type="simple" xlink:show="embed" xlink:actuate="onLoad"/>
    <draw:fill-image draw:name="msFillBitmap_20_23" draw:display-name="msFillBitmap 23" xlink:href="Pictures/1000020100000780000004380007A137417BB6AD.png" xlink:type="simple" xlink:show="embed" xlink:actuate="onLoad"/>
    <draw:fill-image draw:name="msFillBitmap_20_24" draw:display-name="msFillBitmap 24" xlink:href="Pictures/1000020100000780000004380007A137417BB6AD.png" xlink:type="simple" xlink:show="embed" xlink:actuate="onLoad"/>
    <draw:fill-image draw:name="msFillBitmap_20_25" draw:display-name="msFillBitmap 25" xlink:href="Pictures/1000020100000780000004380007A137417BB6AD.png" xlink:type="simple" xlink:show="embed" xlink:actuate="onLoad"/>
    <draw:fill-image draw:name="msFillBitmap_20_26" draw:display-name="msFillBitmap 26" xlink:href="Pictures/1000020100000780000004380007A137417BB6AD.png" xlink:type="simple" xlink:show="embed" xlink:actuate="onLoad"/>
    <draw:fill-image draw:name="msFillBitmap_20_27" draw:display-name="msFillBitmap 27" xlink:href="Pictures/1000020100000780000004380007A137417BB6AD.png" xlink:type="simple" xlink:show="embed" xlink:actuate="onLoad"/>
    <draw:fill-image draw:name="msFillBitmap_20_28" draw:display-name="msFillBitmap 28" xlink:href="Pictures/1000020100000780000004380007A137417BB6AD.png" xlink:type="simple" xlink:show="embed" xlink:actuate="onLoad"/>
    <draw:fill-image draw:name="msFillBitmap_20_29" draw:display-name="msFillBitmap 29" xlink:href="Pictures/100002010000078000000438F65FBB7085B19647.png" xlink:type="simple" xlink:show="embed" xlink:actuate="onLoad"/>
    <draw:fill-image draw:name="msFillBitmap_20_3" draw:display-name="msFillBitmap 3" xlink:href="Pictures/1000020100000780000004380007A137417BB6AD.png" xlink:type="simple" xlink:show="embed" xlink:actuate="onLoad"/>
    <draw:fill-image draw:name="msFillBitmap_20_30" draw:display-name="msFillBitmap 30" xlink:href="Pictures/1000020100000780000004380007A137417BB6AD.png" xlink:type="simple" xlink:show="embed" xlink:actuate="onLoad"/>
    <draw:fill-image draw:name="msFillBitmap_20_31" draw:display-name="msFillBitmap 31" xlink:href="Pictures/1000020100000780000004380007A137417BB6AD.png" xlink:type="simple" xlink:show="embed" xlink:actuate="onLoad"/>
    <draw:fill-image draw:name="msFillBitmap_20_32" draw:display-name="msFillBitmap 32" xlink:href="Pictures/100002010000078000000438F65FBB7085B19647.png" xlink:type="simple" xlink:show="embed" xlink:actuate="onLoad"/>
    <draw:fill-image draw:name="msFillBitmap_20_33" draw:display-name="msFillBitmap 33" xlink:href="Pictures/100002010000078000000438F65FBB7085B19647.png" xlink:type="simple" xlink:show="embed" xlink:actuate="onLoad"/>
    <draw:fill-image draw:name="msFillBitmap_20_34" draw:display-name="msFillBitmap 34" xlink:href="Pictures/100002010000078000000438C4A1CF5D42B33C14.png" xlink:type="simple" xlink:show="embed" xlink:actuate="onLoad"/>
    <draw:fill-image draw:name="msFillBitmap_20_4" draw:display-name="msFillBitmap 4" xlink:href="Pictures/100002010000078000000438F65FBB7085B19647.png" xlink:type="simple" xlink:show="embed" xlink:actuate="onLoad"/>
    <draw:fill-image draw:name="msFillBitmap_20_5" draw:display-name="msFillBitmap 5" xlink:href="Pictures/1000020100000780000004380007A137417BB6AD.png" xlink:type="simple" xlink:show="embed" xlink:actuate="onLoad"/>
    <draw:fill-image draw:name="msFillBitmap_20_6" draw:display-name="msFillBitmap 6" xlink:href="Pictures/1000020100000780000004380007A137417BB6AD.png" xlink:type="simple" xlink:show="embed" xlink:actuate="onLoad"/>
    <draw:fill-image draw:name="msFillBitmap_20_7" draw:display-name="msFillBitmap 7" xlink:href="Pictures/1000020100000780000004380007A137417BB6AD.png" xlink:type="simple" xlink:show="embed" xlink:actuate="onLoad"/>
    <draw:fill-image draw:name="msFillBitmap_20_8" draw:display-name="msFillBitmap 8" xlink:href="Pictures/1000020100000780000004380007A137417BB6AD.png" xlink:type="simple" xlink:show="embed" xlink:actuate="onLoad"/>
    <draw:fill-image draw:name="msFillBitmap_20_9" draw:display-name="msFillBitmap 9" xlink:href="Pictures/1000020100000780000004380007A137417BB6A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6"/>
    <meta:generator>LibreOfficeDev/6.0.5.2$Linux_X86_64 LibreOffice_project/</meta:generator>
  </office:meta>
</office:document-meta>
</file>